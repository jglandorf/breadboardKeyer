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62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807in"/>
    </style:style>
    <style:style style:name="co5" style:family="table-column">
      <style:table-column-properties fo:break-before="auto" style:column-width="1.9618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74pt dotte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74pt dotted #000000" style:vertical-align="middle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74pt dotte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bom_cost" table:style-name="ta1">
        <table:table-column table:style-name="co1" table:default-cell-style-name="ce5"/>
        <table:table-column table:style-name="co2" table:default-cell-style-name="ce9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3" table:number-columns-repeated="16378" table:default-cell-style-name="ce9"/>
        <table:table-row table:style-name="ro1">
          <table:table-cell/>
          <table:table-cell table:style-name="ce6" office:value-type="string" calcext:value-type="string" table:number-columns-spanned="4" table:number-rows-spanned="1">
            <text:p>Breadboard Keyer Kit Checklist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Variants 1, 2: <text:s/>555 tone generator with passive PC speaker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item</text:p>
          </table:table-cell>
          <table:table-cell table:style-name="ce6"/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goes where</text:p>
          </table:table-cell>
          <table:table-cell table:number-columns-repeated="2" table:style-name="ce5" office:value-type="string" calcext:value-type="string">
            <text:p>prep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aperboard bo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fold</text:p>
          </table:table-cell>
          <table:table-cell table:number-columns-repeated="16379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13" office:value-type="string" calcext:value-type="string">
            <text:p>box write-on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box lid</text:p>
          </table:table-cell>
          <table:table-cell office:value-type="string" calcext:value-type="string">
            <text:p>peel, stick</text:p>
          </table:table-cell>
          <table:table-cell table:number-columns-repeated="16379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13" office:value-type="string" calcext:value-type="string">
            <text:p>2x3.5” info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box</text:p>
          </table:table-cell>
          <table:table-cell table:number-columns-repeated="16380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style-name="ce13" office:value-type="string" calcext:value-type="string">
            <text:p>bread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box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style-name="ce13" office:value-type="string" calcext:value-type="string">
            <text:p>jumper wires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 box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style-name="ce13" office:value-type="string" calcext:value-type="string">
            <text:p>touch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box</text:p>
          </table:table-cell>
          <table:table-cell office:value-type="string" calcext:value-type="string">
            <text:p>mark pins</text:p>
          </table:table-cell>
          <table:table-cell table:number-columns-repeated="16379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table:style-name="ce13" office:value-type="string" calcext:value-type="string">
            <text:p>USB break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box</text:p>
          </table:table-cell>
          <table:table-cell office:value-type="string" calcext:value-type="string">
            <text:p>mark pins</text:p>
          </table:table-cell>
          <table:table-cell office:value-type="string" calcext:value-type="string">
            <text:p>remove middle pins</text:p>
          </table:table-cell>
          <table:table-cell table:number-columns-repeated="16378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table:style-name="ce13" office:value-type="string" calcext:value-type="string">
            <text:p>555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box</text:p>
          </table:table-cell>
          <table:table-cell office:value-type="string" calcext:value-type="string">
            <text:p>mark pins</text:p>
          </table:table-cell>
          <table:table-cell office:value-type="string" calcext:value-type="string">
            <text:p>move header</text:p>
          </table:table-cell>
          <table:table-cell table:number-columns-repeated="16378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table:style-name="ce13" office:value-type="string" calcext:value-type="string">
            <text:p>PC 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box</text:p>
          </table:table-cell>
          <table:table-cell table:number-columns-repeated="1638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9:35:09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25T20:53:38.689000000</dc:date>
    <meta:editing-duration>PT2H11M50S</meta:editing-duration>
    <meta:editing-cycles>23</meta:editing-cycles>
    <meta:generator>LibreOffice/24.2.3.2$Windows_X86_64 LibreOffice_project/433d9c2ded56988e8a90e6b2e771ee4e6a5ab2ba</meta:generator>
    <dc:title>Checklist</dc:title>
    <meta:document-statistic meta:table-count="1" meta:cell-count="49" meta:object-count="0"/>
  </office:meta>
</office:document-meta>
</file>