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C7AC578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4572"/>
    </style:style>
    <style:style style:name="P2" style:family="paragraph" style:parent-style-name="Standard">
      <style:text-properties officeooo:rsid="001b4572" officeooo:paragraph-rsid="001bab1e"/>
    </style:style>
    <style:style style:name="P3" style:family="paragraph" style:parent-style-name="Standard">
      <style:text-properties officeooo:rsid="001b4572" officeooo:paragraph-rsid="002569e9"/>
    </style:style>
    <style:style style:name="P4" style:family="paragraph" style:parent-style-name="Standard">
      <style:text-properties officeooo:rsid="001b4572" officeooo:paragraph-rsid="002716e4"/>
    </style:style>
    <style:style style:name="P5" style:family="paragraph" style:parent-style-name="Standard">
      <style:paragraph-properties fo:break-before="page"/>
      <style:text-properties officeooo:rsid="001b4572" officeooo:paragraph-rsid="002716e4"/>
    </style:style>
    <style:style style:name="P6" style:family="paragraph" style:parent-style-name="Standard">
      <style:text-properties fo:font-size="11pt" officeooo:rsid="001b4572" officeooo:paragraph-rsid="001bab1e" style:font-size-asian="11pt" style:font-size-complex="11pt"/>
    </style:style>
    <style:style style:name="P7" style:family="paragraph" style:parent-style-name="Standard">
      <style:text-properties fo:font-size="11pt" officeooo:rsid="001b4572" officeooo:paragraph-rsid="002716e4" style:font-size-asian="11pt" style:font-size-complex="11pt"/>
    </style:style>
    <style:style style:name="P8" style:family="paragraph" style:parent-style-name="Standard">
      <style:text-properties fo:font-size="12pt" fo:font-weight="bold" officeooo:paragraph-rsid="002716e4" style:font-size-asian="12pt" style:font-weight-asian="bold" style:font-size-complex="12pt" style:font-weight-complex="bold"/>
    </style:style>
    <style:style style:name="P9" style:family="paragraph" style:parent-style-name="Standard">
      <style:text-properties fo:font-weight="bold" officeooo:rsid="001b4572" style:font-weight-asian="bold" style:font-weight-complex="bold"/>
    </style:style>
    <style:style style:name="P10" style:family="paragraph" style:parent-style-name="Standard">
      <style:text-properties fo:font-weight="bold" officeooo:rsid="001b4572" officeooo:paragraph-rsid="002716e4" style:font-weight-asian="bold" style:font-weight-complex="bold"/>
    </style:style>
    <style:style style:name="P11" style:family="paragraph" style:parent-style-name="Standard">
      <style:text-properties fo:font-weight="bold" officeooo:rsid="001bab1e" officeooo:paragraph-rsid="002716e4" style:font-weight-asian="bold" style:font-weight-complex="bold"/>
    </style:style>
    <style:style style:name="P12" style:family="paragraph" style:parent-style-name="Standard">
      <style:text-properties fo:font-size="13pt" fo:font-weight="bold" officeooo:rsid="001b4572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1b4572" officeooo:paragraph-rsid="002716e4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2pt" fo:font-weight="bold" officeooo:paragraph-rsid="002fd08f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paragraph-rsid="0032c3e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paragraph-rsid="0033c6a2" style:font-size-asian="12pt" style:font-weight-asian="bold" style:font-size-complex="12pt" style:font-weight-complex="bold"/>
    </style:style>
    <style:style style:name="P17" style:family="paragraph" style:parent-style-name="Standard">
      <style:text-properties fo:font-weight="bold" officeooo:rsid="001bab1e" officeooo:paragraph-rsid="002fd08f" style:font-weight-asian="bold" style:font-weight-complex="bold"/>
    </style:style>
    <style:style style:name="P18" style:family="paragraph" style:parent-style-name="Standard">
      <style:text-properties fo:font-weight="bold" officeooo:rsid="001bab1e" officeooo:paragraph-rsid="0032c3ed" style:font-weight-asian="bold" style:font-weight-complex="bold"/>
    </style:style>
    <style:style style:name="P19" style:family="paragraph" style:parent-style-name="Standard">
      <style:text-properties fo:font-weight="bold" officeooo:rsid="001bab1e" officeooo:paragraph-rsid="0033c6a2" style:font-weight-asian="bold" style:font-weight-complex="bold"/>
    </style:style>
    <style:style style:name="P20" style:family="paragraph" style:parent-style-name="Standard">
      <style:text-properties fo:font-weight="bold" officeooo:rsid="001b4572" officeooo:paragraph-rsid="0032c3ed" style:font-weight-asian="bold" style:font-weight-complex="bold"/>
    </style:style>
    <style:style style:name="P21" style:family="paragraph" style:parent-style-name="Standard">
      <style:text-properties fo:font-weight="bold" officeooo:rsid="001b4572" officeooo:paragraph-rsid="0033c6a2" style:font-weight-asian="bold" style:font-weight-complex="bold"/>
    </style:style>
    <style:style style:name="P22" style:family="paragraph" style:parent-style-name="Standard">
      <style:text-properties officeooo:rsid="001b4572" officeooo:paragraph-rsid="0032c3ed"/>
    </style:style>
    <style:style style:name="P23" style:family="paragraph" style:parent-style-name="Standard">
      <style:text-properties officeooo:rsid="001b4572" officeooo:paragraph-rsid="0033c6a2"/>
    </style:style>
    <style:style style:name="P24" style:family="paragraph" style:parent-style-name="Standard">
      <style:text-properties fo:font-size="13pt" fo:font-weight="bold" officeooo:rsid="001b4572" officeooo:paragraph-rsid="0032c3ed" style:font-size-asian="13pt" style:font-weight-asian="bold" style:font-size-complex="13pt" style:font-weight-complex="bold"/>
    </style:style>
    <style:style style:name="P25" style:family="paragraph" style:parent-style-name="Standard">
      <style:text-properties fo:font-size="13pt" fo:font-weight="bold" officeooo:rsid="001b4572" officeooo:paragraph-rsid="0033c6a2" style:font-size-asian="13pt" style:font-weight-asian="bold" style:font-size-complex="13pt" style:font-weight-complex="bold"/>
    </style:style>
    <style:style style:name="P26" style:family="paragraph" style:parent-style-name="Standard">
      <style:text-properties fo:font-size="11pt" officeooo:rsid="001b4572" officeooo:paragraph-rsid="0032c3ed" style:font-size-asian="11pt" style:font-size-complex="11pt"/>
    </style:style>
    <style:style style:name="P27" style:family="paragraph" style:parent-style-name="Standard">
      <style:text-properties fo:font-size="11pt" officeooo:rsid="001b4572" officeooo:paragraph-rsid="0033c6a2" style:font-size-asian="11pt" style:font-size-complex="11pt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20b9db"/>
    </style:style>
    <style:style style:name="T3" style:family="text">
      <style:text-properties fo:color="#000000" loext:opacity="100%" fo:font-size="10pt" style:text-underline-style="none" style:font-size-asian="10pt" style:font-size-complex="10pt"/>
    </style:style>
    <style:style style:name="T4" style:family="text">
      <style:text-properties fo:color="#000000" loext:opacity="100%" fo:font-size="10pt" style:text-underline-style="none" officeooo:rsid="0020b9db" style:font-size-asian="10pt" style:font-size-complex="10pt"/>
    </style:style>
    <style:style style:name="T5" style:family="text">
      <style:text-properties fo:color="#000000" loext:opacity="100%" fo:font-size="10pt" style:text-underline-style="none" officeooo:rsid="002fd08f" style:font-size-asian="10pt" style:font-size-complex="10pt"/>
    </style:style>
    <style:style style:name="T6" style:family="text">
      <style:text-properties fo:color="#000000" loext:opacity="100%" fo:font-size="9pt" style:text-underline-style="none" officeooo:rsid="0020b9db" style:font-size-asian="9pt" style:font-size-complex="9pt"/>
    </style:style>
    <style:style style:name="T7" style:family="text">
      <style:text-properties fo:color="#000000" loext:opacity="100%" fo:font-size="9pt" style:text-underline-style="none" officeooo:rsid="002fd08f" style:font-size-asian="9pt" style:font-size-complex="9pt"/>
    </style:style>
    <style:style style:name="T8" style:family="text">
      <style:text-properties fo:color="#000000" loext:opacity="100%" fo:font-size="7pt" style:text-underline-style="none" style:font-size-asian="7pt" style:font-size-complex="7pt"/>
    </style:style>
    <style:style style:name="T9" style:family="text">
      <style:text-properties fo:color="#000000" loext:opacity="100%" fo:font-size="6pt" style:text-underline-style="none" style:font-size-asian="6pt" style:font-size-complex="6pt"/>
    </style:style>
    <style:style style:name="T10" style:family="text">
      <style:text-properties officeooo:rsid="0020b9d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b9db" style:font-weight-asian="bold" style:font-weight-complex="bold"/>
    </style:style>
    <style:style style:name="T13" style:family="text">
      <style:text-properties fo:font-weight="bold" officeooo:rsid="002fd08f" style:font-weight-asian="bold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21028f" style:font-size-asian="11pt" style:font-size-complex="11pt"/>
    </style:style>
    <style:style style:name="T16" style:family="text">
      <style:text-properties fo:font-size="11pt" officeooo:rsid="002fd08f" style:font-size-asian="11pt" style:font-size-complex="11pt"/>
    </style:style>
    <style:style style:name="T17" style:family="text">
      <style:text-properties fo:font-size="11pt" fo:font-weight="normal" officeooo:rsid="002569e9" style:font-size-asian="11pt" style:font-weight-asian="normal" style:font-size-complex="11pt" style:font-weight-complex="normal"/>
    </style:style>
    <style:style style:name="T18" style:family="text">
      <style:text-properties fo:font-size="11pt" fo:font-weight="normal" officeooo:rsid="002fd08f" style:font-size-asian="11pt" style:font-weight-asian="normal" style:font-size-complex="11pt" style:font-weight-complex="normal"/>
    </style:style>
    <style:style style:name="T19" style:family="text">
      <style:text-properties fo:font-size="13pt" fo:font-weight="bold" style:font-size-asian="13pt" style:font-weight-asian="bold" style:font-size-complex="13pt" style:font-weight-complex="bold"/>
    </style:style>
    <style:style style:name="T20" style:family="text">
      <style:text-properties officeooo:rsid="002fd08f"/>
    </style:style>
    <style:style style:name="T21" style:family="text">
      <style:text-properties fo:font-size="10.5pt" officeooo:rsid="002fd08f" style:font-size-asian="10.5pt" style:font-size-complex="10.5pt"/>
    </style:style>
    <style:style style:name="T22" style:family="text">
      <style:text-properties fo:font-size="10.5pt" officeooo:rsid="0034132a" style:font-size-asian="10.5pt" style:font-size-complex="10.5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0" text:anchor-type="page" text:anchor-page-number="1" svg:x="4.25in" svg:y="8.5in" svg:width="3.5in" svg:height="2in" draw:z-index="6">
        <draw:text-box>
          <text:p text:style-name="P23"/>
          <text:p text:style-name="P23"><draw:frame draw:style-name="fr2" draw:name="Image1 Copy 9" text:anchor-type="char" svg:x="2in" svg:y="-0.0402in" svg:width="1.4in" svg:height="1.4in" draw:z-index="18"><draw:image xlink:href="Pictures/10000000000000E1000000E1C7AC578D.png" xlink:type="simple" xlink:show="embed" xlink:actuate="onLoad" draw:mime-type="image/png"/></draw:frame><text:s text:c="2"/><text:span text:style-name="T11"><text:s/></text:span><text:span text:style-name="T12">ARROW -- </text:span><text:a xlink:type="simple" xlink:href="http://w8rp.org/" text:style-name="Internet_20_link" text:visited-style-name="Visited_20_Internet_20_Link"><text:span text:style-name="T13">w8rp.org</text:span></text:a></text:p>
          <text:p text:style-name="P21"><text:s text:c="3"/><text:span text:style-name="T21">My </text:span><text:span text:style-name="T22">N</text:span><text:span text:style-name="T21">ame in Morse Code:</text:span> </text:p>
          <text:p text:style-name="P23"><text:s text:c="2"/><text:span text:style-name="T20">______________________</text:span> </text:p>
          <text:p text:style-name="P25"><text:span text:style-name="T17"><text:s text:c="2"/></text:span><text:span text:style-name="T18">________________________</text:span></text:p>
          <text:p text:style-name="P23"><text:span text:style-name="T14"><text:s text:c="2"/></text:span><text:span text:style-name="T16">_________________________</text:span></text:p>
          <text:p text:style-name="P19"><text:s text:c="2"/><text:span text:style-name="T18">__________________________</text:span></text:p>
          <text:p text:style-name="P16"><text:span text:style-name="T9"><text:line-break/></text:span><text:span text:style-name="T1"> <text:s text:c="2"/></text:span><text:span text:style-name="T6">Field Day Breadboard Keyer </text:span><text:span text:style-name="T7">Kit:</text:span></text:p>
          <text:p text:style-name="P27"><text:s text:c="3"/><text:a xlink:type="simple" xlink:href="https://github.com/jglandorf/breadboardKeyer" text:style-name="Internet_20_link" text:visited-style-name="Visited_20_Internet_20_Link"><text:span text:style-name="T10">https://github.com/jglandorf/breadboardKeyer</text:span></text:a> </text:p>
          <text:p text:style-name="P23"/>
        </draw:text-box>
      </draw:frame>
      <draw:frame draw:style-name="fr1" draw:name="Frame9" text:anchor-type="page" text:anchor-page-number="1" svg:x="0.75in" svg:y="8.5in" svg:width="3.5in" svg:height="2in" draw:z-index="3">
        <draw:text-box>
          <text:p text:style-name="P23"/>
          <text:p text:style-name="P23"><draw:frame draw:style-name="fr2" draw:name="Image1 Copy 8" text:anchor-type="char" svg:x="2in" svg:y="-0.0402in" svg:width="1.4in" svg:height="1.4in" draw:z-index="19"><draw:image xlink:href="Pictures/10000000000000E1000000E1C7AC578D.png" xlink:type="simple" xlink:show="embed" xlink:actuate="onLoad" draw:mime-type="image/png"/></draw:frame><text:s text:c="2"/><text:span text:style-name="T11"><text:s/></text:span><text:span text:style-name="T12">ARROW -- </text:span><text:a xlink:type="simple" xlink:href="http://w8rp.org/" text:style-name="Internet_20_link" text:visited-style-name="Visited_20_Internet_20_Link"><text:span text:style-name="T13">w8rp.org</text:span></text:a></text:p>
          <text:p text:style-name="P21"><text:s text:c="3"/><text:span text:style-name="T21">My </text:span><text:span text:style-name="T22">N</text:span><text:span text:style-name="T21">ame in Morse Code:</text:span> </text:p>
          <text:p text:style-name="P23"><text:s text:c="2"/><text:span text:style-name="T20">______________________</text:span> </text:p>
          <text:p text:style-name="P25"><text:span text:style-name="T17"><text:s text:c="2"/></text:span><text:span text:style-name="T18">________________________</text:span></text:p>
          <text:p text:style-name="P23"><text:span text:style-name="T14"><text:s text:c="2"/></text:span><text:span text:style-name="T16">_________________________</text:span></text:p>
          <text:p text:style-name="P19"><text:s text:c="2"/><text:span text:style-name="T18">__________________________</text:span></text:p>
          <text:p text:style-name="P16"><text:span text:style-name="T9"><text:line-break/></text:span><text:span text:style-name="T1"> <text:s text:c="2"/></text:span><text:span text:style-name="T6">Field Day Breadboard Keyer </text:span><text:span text:style-name="T7">Kit:</text:span></text:p>
          <text:p text:style-name="P27"><text:s text:c="3"/><text:a xlink:type="simple" xlink:href="https://github.com/jglandorf/breadboardKeyer" text:style-name="Internet_20_link" text:visited-style-name="Visited_20_Internet_20_Link"><text:span text:style-name="T10">https://github.com/jglandorf/breadboardKeyer</text:span></text:a> </text:p>
          <text:p text:style-name="P23"/>
        </draw:text-box>
      </draw:frame>
      <draw:frame draw:style-name="fr1" draw:name="Frame8" text:anchor-type="page" text:anchor-page-number="1" svg:x="4.25in" svg:y="6.5in" svg:width="3.5in" svg:height="2in" draw:z-index="4">
        <draw:text-box>
          <text:p text:style-name="P23"/>
          <text:p text:style-name="P23"><draw:frame draw:style-name="fr2" draw:name="Image1 Copy 7" text:anchor-type="char" svg:x="2in" svg:y="-0.0402in" svg:width="1.4in" svg:height="1.4in" draw:z-index="16"><draw:image xlink:href="Pictures/10000000000000E1000000E1C7AC578D.png" xlink:type="simple" xlink:show="embed" xlink:actuate="onLoad" draw:mime-type="image/png"/></draw:frame><text:s text:c="2"/><text:span text:style-name="T11"><text:s/></text:span><text:span text:style-name="T12">ARROW -- </text:span><text:a xlink:type="simple" xlink:href="http://w8rp.org/" text:style-name="Internet_20_link" text:visited-style-name="Visited_20_Internet_20_Link"><text:span text:style-name="T13">w8rp.org</text:span></text:a></text:p>
          <text:p text:style-name="P21"><text:s text:c="3"/><text:span text:style-name="T21">My </text:span><text:span text:style-name="T22">N</text:span><text:span text:style-name="T21">ame in Morse Code:</text:span> </text:p>
          <text:p text:style-name="P23"><text:s text:c="2"/><text:span text:style-name="T20">______________________</text:span> </text:p>
          <text:p text:style-name="P25"><text:span text:style-name="T17"><text:s text:c="2"/></text:span><text:span text:style-name="T18">________________________</text:span></text:p>
          <text:p text:style-name="P23"><text:span text:style-name="T14"><text:s text:c="2"/></text:span><text:span text:style-name="T16">_________________________</text:span></text:p>
          <text:p text:style-name="P19"><text:s text:c="2"/><text:span text:style-name="T18">__________________________</text:span></text:p>
          <text:p text:style-name="P16"><text:span text:style-name="T9"><text:line-break/></text:span><text:span text:style-name="T1"> <text:s text:c="2"/></text:span><text:span text:style-name="T6">Field Day Breadboard Keyer </text:span><text:span text:style-name="T7">Kit:</text:span></text:p>
          <text:p text:style-name="P27"><text:s text:c="3"/><text:a xlink:type="simple" xlink:href="https://github.com/jglandorf/breadboardKeyer" text:style-name="Internet_20_link" text:visited-style-name="Visited_20_Internet_20_Link"><text:span text:style-name="T10">https://github.com/jglandorf/breadboardKeyer</text:span></text:a> </text:p>
          <text:p text:style-name="P23"/>
        </draw:text-box>
      </draw:frame>
      <draw:frame draw:style-name="fr1" draw:name="Frame7" text:anchor-type="page" text:anchor-page-number="1" svg:x="0.75in" svg:y="6.5in" svg:width="3.5in" svg:height="2in" draw:z-index="2">
        <draw:text-box>
          <text:p text:style-name="P23"/>
          <text:p text:style-name="P23"><draw:frame draw:style-name="fr2" draw:name="Image1 Copy 6" text:anchor-type="char" svg:x="2in" svg:y="-0.0402in" svg:width="1.4in" svg:height="1.4in" draw:z-index="17"><draw:image xlink:href="Pictures/10000000000000E1000000E1C7AC578D.png" xlink:type="simple" xlink:show="embed" xlink:actuate="onLoad" draw:mime-type="image/png"/></draw:frame><text:s text:c="2"/><text:span text:style-name="T11"><text:s/></text:span><text:span text:style-name="T12">ARROW -- </text:span><text:a xlink:type="simple" xlink:href="http://w8rp.org/" text:style-name="Internet_20_link" text:visited-style-name="Visited_20_Internet_20_Link"><text:span text:style-name="T13">w8rp.org</text:span></text:a></text:p>
          <text:p text:style-name="P21"><text:s text:c="3"/><text:span text:style-name="T21">My </text:span><text:span text:style-name="T22">N</text:span><text:span text:style-name="T21">ame in Morse Code:</text:span> </text:p>
          <text:p text:style-name="P23"><text:s text:c="2"/><text:span text:style-name="T20">______________________</text:span> </text:p>
          <text:p text:style-name="P25"><text:span text:style-name="T17"><text:s text:c="2"/></text:span><text:span text:style-name="T18">________________________</text:span></text:p>
          <text:p text:style-name="P23"><text:span text:style-name="T14"><text:s text:c="2"/></text:span><text:span text:style-name="T16">_________________________</text:span></text:p>
          <text:p text:style-name="P19"><text:s text:c="2"/><text:span text:style-name="T18">__________________________</text:span></text:p>
          <text:p text:style-name="P16"><text:span text:style-name="T9"><text:line-break/></text:span><text:span text:style-name="T1"> <text:s text:c="2"/></text:span><text:span text:style-name="T6">Field Day Breadboard Keyer </text:span><text:span text:style-name="T7">Kit:</text:span></text:p>
          <text:p text:style-name="P27"><text:s text:c="3"/><text:a xlink:type="simple" xlink:href="https://github.com/jglandorf/breadboardKeyer" text:style-name="Internet_20_link" text:visited-style-name="Visited_20_Internet_20_Link"><text:span text:style-name="T10">https://github.com/jglandorf/breadboardKeyer</text:span></text:a> </text:p>
          <text:p text:style-name="P23"/>
        </draw:text-box>
      </draw:frame>
      <draw:frame draw:style-name="fr1" draw:name="Frame6" text:anchor-type="page" text:anchor-page-number="1" svg:x="4.25in" svg:y="4.5in" svg:width="3.5in" svg:height="2in" draw:z-index="0">
        <draw:text-box>
          <text:p text:style-name="P23"/>
          <text:p text:style-name="P23"><draw:frame draw:style-name="fr2" draw:name="Image1 Copy 5" text:anchor-type="char" svg:x="2in" svg:y="-0.0402in" svg:width="1.4in" svg:height="1.4in" draw:z-index="14"><draw:image xlink:href="Pictures/10000000000000E1000000E1C7AC578D.png" xlink:type="simple" xlink:show="embed" xlink:actuate="onLoad" draw:mime-type="image/png"/></draw:frame><text:s text:c="2"/><text:span text:style-name="T11"><text:s/></text:span><text:span text:style-name="T12">ARROW -- </text:span><text:a xlink:type="simple" xlink:href="http://w8rp.org/" text:style-name="Internet_20_link" text:visited-style-name="Visited_20_Internet_20_Link"><text:span text:style-name="T13">w8rp.org</text:span></text:a></text:p>
          <text:p text:style-name="P21"><text:s text:c="3"/><text:span text:style-name="T21">My </text:span><text:span text:style-name="T22">N</text:span><text:span text:style-name="T21">ame in Morse Code:</text:span> </text:p>
          <text:p text:style-name="P23"><text:s text:c="2"/><text:span text:style-name="T20">______________________</text:span> </text:p>
          <text:p text:style-name="P25"><text:span text:style-name="T17"><text:s text:c="2"/></text:span><text:span text:style-name="T18">________________________</text:span></text:p>
          <text:p text:style-name="P23"><text:span text:style-name="T14"><text:s text:c="2"/></text:span><text:span text:style-name="T16">_________________________</text:span></text:p>
          <text:p text:style-name="P19"><text:s text:c="2"/><text:span text:style-name="T18">__________________________</text:span></text:p>
          <text:p text:style-name="P16"><text:span text:style-name="T9"><text:line-break/></text:span><text:span text:style-name="T1"> <text:s text:c="2"/></text:span><text:span text:style-name="T6">Field Day Breadboard Keyer </text:span><text:span text:style-name="T7">Kit:</text:span></text:p>
          <text:p text:style-name="P27"><text:s text:c="3"/><text:a xlink:type="simple" xlink:href="https://github.com/jglandorf/breadboardKeyer" text:style-name="Internet_20_link" text:visited-style-name="Visited_20_Internet_20_Link"><text:span text:style-name="T10">https://github.com/jglandorf/breadboardKeyer</text:span></text:a> </text:p>
          <text:p text:style-name="P23"/>
        </draw:text-box>
      </draw:frame>
      <draw:frame draw:style-name="fr1" draw:name="Frame5" text:anchor-type="page" text:anchor-page-number="1" svg:x="0.75in" svg:y="4.5in" svg:width="3.5in" svg:height="2in" draw:z-index="5">
        <draw:text-box>
          <text:p text:style-name="P23"/>
          <text:p text:style-name="P23"><draw:frame draw:style-name="fr2" draw:name="Image1 Copy 4" text:anchor-type="char" svg:x="2in" svg:y="-0.0402in" svg:width="1.4in" svg:height="1.4in" draw:z-index="15"><draw:image xlink:href="Pictures/10000000000000E1000000E1C7AC578D.png" xlink:type="simple" xlink:show="embed" xlink:actuate="onLoad" draw:mime-type="image/png"/></draw:frame><text:s text:c="2"/><text:span text:style-name="T11"><text:s/></text:span><text:span text:style-name="T12">ARROW -- </text:span><text:a xlink:type="simple" xlink:href="http://w8rp.org/" text:style-name="Internet_20_link" text:visited-style-name="Visited_20_Internet_20_Link"><text:span text:style-name="T13">w8rp.org</text:span></text:a></text:p>
          <text:p text:style-name="P21"><text:s text:c="3"/><text:span text:style-name="T21">My </text:span><text:span text:style-name="T22">N</text:span><text:span text:style-name="T21">ame in Morse Code:</text:span> </text:p>
          <text:p text:style-name="P23"><text:s text:c="2"/><text:span text:style-name="T20">______________________</text:span> </text:p>
          <text:p text:style-name="P25"><text:span text:style-name="T17"><text:s text:c="2"/></text:span><text:span text:style-name="T18">________________________</text:span></text:p>
          <text:p text:style-name="P23"><text:span text:style-name="T14"><text:s text:c="2"/></text:span><text:span text:style-name="T16">_________________________</text:span></text:p>
          <text:p text:style-name="P19"><text:s text:c="2"/><text:span text:style-name="T18">__________________________</text:span></text:p>
          <text:p text:style-name="P16"><text:span text:style-name="T9"><text:line-break/></text:span><text:span text:style-name="T1"> <text:s text:c="2"/></text:span><text:span text:style-name="T6">Field Day Breadboard Keyer </text:span><text:span text:style-name="T7">Kit:</text:span></text:p>
          <text:p text:style-name="P27"><text:s text:c="3"/><text:a xlink:type="simple" xlink:href="https://github.com/jglandorf/breadboardKeyer" text:style-name="Internet_20_link" text:visited-style-name="Visited_20_Internet_20_Link"><text:span text:style-name="T10">https://github.com/jglandorf/breadboardKeyer</text:span></text:a> </text:p>
          <text:p text:style-name="P23"/>
        </draw:text-box>
      </draw:frame>
      <draw:frame draw:style-name="fr1" draw:name="Frame4" text:anchor-type="page" text:anchor-page-number="1" svg:x="4.25in" svg:y="2.5in" svg:width="3.5in" svg:height="2in" draw:z-index="10">
        <draw:text-box>
          <text:p text:style-name="P23"/>
          <text:p text:style-name="P23"><draw:frame draw:style-name="fr2" draw:name="Image1 Copy 3" text:anchor-type="char" svg:x="2in" svg:y="-0.0402in" svg:width="1.4in" svg:height="1.4in" draw:z-index="12"><draw:image xlink:href="Pictures/10000000000000E1000000E1C7AC578D.png" xlink:type="simple" xlink:show="embed" xlink:actuate="onLoad" draw:mime-type="image/png"/></draw:frame><text:s text:c="2"/><text:span text:style-name="T11"><text:s/></text:span><text:span text:style-name="T12">ARROW -- </text:span><text:a xlink:type="simple" xlink:href="http://w8rp.org/" text:style-name="Internet_20_link" text:visited-style-name="Visited_20_Internet_20_Link"><text:span text:style-name="T13">w8rp.org</text:span></text:a></text:p>
          <text:p text:style-name="P21"><text:s text:c="3"/><text:span text:style-name="T21">My </text:span><text:span text:style-name="T22">N</text:span><text:span text:style-name="T21">ame in Morse Code:</text:span> </text:p>
          <text:p text:style-name="P23"><text:s text:c="2"/><text:span text:style-name="T20">______________________</text:span> </text:p>
          <text:p text:style-name="P25"><text:span text:style-name="T17"><text:s text:c="2"/></text:span><text:span text:style-name="T18">________________________</text:span></text:p>
          <text:p text:style-name="P23"><text:span text:style-name="T14"><text:s text:c="2"/></text:span><text:span text:style-name="T16">_________________________</text:span></text:p>
          <text:p text:style-name="P19"><text:s text:c="2"/><text:span text:style-name="T18">__________________________</text:span></text:p>
          <text:p text:style-name="P16"><text:span text:style-name="T9"><text:line-break/></text:span><text:span text:style-name="T1"> <text:s text:c="2"/></text:span><text:span text:style-name="T6">Field Day Breadboard Keyer </text:span><text:span text:style-name="T7">Kit:</text:span></text:p>
          <text:p text:style-name="P27"><text:s text:c="3"/><text:a xlink:type="simple" xlink:href="https://github.com/jglandorf/breadboardKeyer" text:style-name="Internet_20_link" text:visited-style-name="Visited_20_Internet_20_Link"><text:span text:style-name="T10">https://github.com/jglandorf/breadboardKeyer</text:span></text:a> </text:p>
          <text:p text:style-name="P23"/>
        </draw:text-box>
      </draw:frame>
      <draw:frame draw:style-name="fr1" draw:name="Frame3" text:anchor-type="page" text:anchor-page-number="1" svg:x="0.75in" svg:y="2.5in" svg:width="3.5in" svg:height="2in" draw:z-index="7">
        <draw:text-box>
          <text:p text:style-name="P23"/>
          <text:p text:style-name="P23"><draw:frame draw:style-name="fr2" draw:name="Image1 Copy 2" text:anchor-type="char" svg:x="2in" svg:y="-0.0402in" svg:width="1.4in" svg:height="1.4in" draw:z-index="13"><draw:image xlink:href="Pictures/10000000000000E1000000E1C7AC578D.png" xlink:type="simple" xlink:show="embed" xlink:actuate="onLoad" draw:mime-type="image/png"/></draw:frame><text:s text:c="2"/><text:span text:style-name="T11"><text:s/></text:span><text:span text:style-name="T12">ARROW -- </text:span><text:a xlink:type="simple" xlink:href="http://w8rp.org/" text:style-name="Internet_20_link" text:visited-style-name="Visited_20_Internet_20_Link"><text:span text:style-name="T13">w8rp.org</text:span></text:a></text:p>
          <text:p text:style-name="P21"><text:s text:c="3"/><text:span text:style-name="T21">My </text:span><text:span text:style-name="T22">N</text:span><text:span text:style-name="T21">ame in Morse Code:</text:span> </text:p>
          <text:p text:style-name="P23"><text:s text:c="2"/><text:span text:style-name="T20">______________________</text:span> </text:p>
          <text:p text:style-name="P25"><text:span text:style-name="T17"><text:s text:c="2"/></text:span><text:span text:style-name="T18">________________________</text:span></text:p>
          <text:p text:style-name="P23"><text:span text:style-name="T14"><text:s text:c="2"/></text:span><text:span text:style-name="T16">_________________________</text:span></text:p>
          <text:p text:style-name="P19"><text:s text:c="2"/><text:span text:style-name="T18">__________________________</text:span></text:p>
          <text:p text:style-name="P16"><text:span text:style-name="T9"><text:line-break/></text:span><text:span text:style-name="T1"> <text:s text:c="2"/></text:span><text:span text:style-name="T6">Field Day Breadboard Keyer </text:span><text:span text:style-name="T7">Kit:</text:span></text:p>
          <text:p text:style-name="P27"><text:s text:c="3"/><text:a xlink:type="simple" xlink:href="https://github.com/jglandorf/breadboardKeyer" text:style-name="Internet_20_link" text:visited-style-name="Visited_20_Internet_20_Link"><text:span text:style-name="T10">https://github.com/jglandorf/breadboardKeyer</text:span></text:a> </text:p>
          <text:p text:style-name="P23"/>
        </draw:text-box>
      </draw:frame>
      <draw:frame draw:style-name="fr1" draw:name="Frame2" text:anchor-type="page" text:anchor-page-number="1" svg:x="4.25in" svg:y="0.5in" svg:width="3.5in" svg:height="2in" draw:z-index="9">
        <draw:text-box>
          <text:p text:style-name="P23"/>
          <text:p text:style-name="P23"><draw:frame draw:style-name="fr2" draw:name="Image1 Copy 1" text:anchor-type="char" svg:x="2in" svg:y="-0.0402in" svg:width="1.4in" svg:height="1.4in" draw:z-index="11"><draw:image xlink:href="Pictures/10000000000000E1000000E1C7AC578D.png" xlink:type="simple" xlink:show="embed" xlink:actuate="onLoad" draw:mime-type="image/png"/></draw:frame><text:s text:c="2"/><text:span text:style-name="T11"><text:s/></text:span><text:span text:style-name="T12">ARROW -- </text:span><text:a xlink:type="simple" xlink:href="http://w8rp.org/" text:style-name="Internet_20_link" text:visited-style-name="Visited_20_Internet_20_Link"><text:span text:style-name="T13">w8rp.org</text:span></text:a></text:p>
          <text:p text:style-name="P21"><text:s text:c="3"/><text:span text:style-name="T21">My </text:span><text:span text:style-name="T22">N</text:span><text:span text:style-name="T21">ame in Morse Code:</text:span> </text:p>
          <text:p text:style-name="P23"><text:s text:c="2"/><text:span text:style-name="T20">______________________</text:span> </text:p>
          <text:p text:style-name="P25"><text:span text:style-name="T17"><text:s text:c="2"/></text:span><text:span text:style-name="T18">________________________</text:span></text:p>
          <text:p text:style-name="P23"><text:span text:style-name="T14"><text:s text:c="2"/></text:span><text:span text:style-name="T16">_________________________</text:span></text:p>
          <text:p text:style-name="P19"><text:s text:c="2"/><text:span text:style-name="T18">__________________________</text:span></text:p>
          <text:p text:style-name="P16"><text:span text:style-name="T9"><text:line-break/></text:span><text:span text:style-name="T1"> <text:s text:c="2"/></text:span><text:span text:style-name="T6">Field Day Breadboard Keyer </text:span><text:span text:style-name="T7">Kit:</text:span></text:p>
          <text:p text:style-name="P27"><text:s text:c="3"/><text:a xlink:type="simple" xlink:href="https://github.com/jglandorf/breadboardKeyer" text:style-name="Internet_20_link" text:visited-style-name="Visited_20_Internet_20_Link"><text:span text:style-name="T10">https://github.com/jglandorf/breadboardKeyer</text:span></text:a> </text:p>
          <text:p text:style-name="P23"/>
        </draw:text-box>
      </draw:frame>
      <draw:frame draw:style-name="fr1" draw:name="Frame1" text:anchor-type="page" text:anchor-page-number="1" svg:x="0.75in" svg:y="0.5in" svg:width="3.5in" svg:height="2in" draw:z-index="1">
        <draw:text-box>
          <text:p text:style-name="P1"/>
          <text:p text:style-name="P1"><text:s text:c="2"/><text:span text:style-name="T11"><text:s/></text:span><draw:frame draw:style-name="fr2" draw:name="Image1" text:anchor-type="char" svg:x="2in" svg:y="-0.0402in" svg:width="1.4in" svg:height="1.4in" draw:z-index="8"><draw:image xlink:href="Pictures/10000000000000E1000000E1C7AC578D.png" xlink:type="simple" xlink:show="embed" xlink:actuate="onLoad" draw:mime-type="image/png"/></draw:frame><text:span text:style-name="T12">ARROW -- </text:span><text:a xlink:type="simple" xlink:href="http://w8rp.org/" text:style-name="Internet_20_link" text:visited-style-name="Visited_20_Internet_20_Link"><text:span text:style-name="T13">w8rp.org</text:span></text:a></text:p>
          <text:p text:style-name="P9"><text:s text:c="3"/><text:span text:style-name="T21">My </text:span><text:span text:style-name="T22">N</text:span><text:span text:style-name="T21">ame in Morse Code:</text:span> </text:p>
          <text:p text:style-name="P3"><text:s text:c="2"/><text:span text:style-name="T20">______________________</text:span> </text:p>
          <text:p text:style-name="P12"><text:span text:style-name="T17"><text:s text:c="2"/></text:span><text:span text:style-name="T18">________________________</text:span></text:p>
          <text:p text:style-name="P1"><text:span text:style-name="T14"><text:s text:c="2"/></text:span><text:span text:style-name="T16">_________________________</text:span></text:p>
          <text:p text:style-name="P17"><text:s text:c="2"/><text:span text:style-name="T18">__________________________</text:span></text:p>
          <text:p text:style-name="P14"><text:span text:style-name="T9"><text:line-break/></text:span><text:span text:style-name="T1"> <text:s text:c="2"/></text:span><text:span text:style-name="T6">Field Day Breadboard Keyer </text:span><text:span text:style-name="T7">Kit:</text:span></text:p>
          <text:p text:style-name="P6"><text:s text:c="3"/><text:a xlink:type="simple" xlink:href="https://github.com/jglandorf/breadboardKeyer" text:style-name="Internet_20_link" text:visited-style-name="Visited_20_Internet_20_Link"><text:span text:style-name="T10">https://github.com/jglandorf/breadboardKeyer</text:span></text:a> </text:p>
          <text:p text:style-name="P2"/>
        </draw:text-box>
      </draw:fram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7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11:32:37.090347000</meta:creation-date>
    <dc:date>2026-06-23T21:55:51.266000000</dc:date>
    <meta:editing-duration>PT2H39M53S</meta:editing-duration>
    <meta:editing-cycles>24</meta:editing-cycles>
    <meta:generator>LibreOffice/24.2.3.2$Windows_X86_64 LibreOffice_project/433d9c2ded56988e8a90e6b2e771ee4e6a5ab2ba</meta:generator>
    <meta:print-date>2025-05-11T15:40:19.050000000</meta:print-date>
    <meta:document-statistic meta:table-count="0" meta:image-count="10" meta:object-count="0" meta:page-count="1" meta:paragraph-count="80" meta:word-count="180" meta:character-count="2350" meta:non-whitespace-character-count="2010"/>
  </office:meta>
</office:document-meta>
</file>