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50000038BF9F5F0D0.jpg" manifest:media-type="image/jpeg"/>
  <manifest:file-entry manifest:full-path="Pictures/1000000000000086000000821FC5353C.jpg" manifest:media-type="image/jpeg"/>
  <manifest:file-entry manifest:full-path="Pictures/100000000000011D000000B2FCB53790.png" manifest:media-type="image/png"/>
  <manifest:file-entry manifest:full-path="Pictures/1000000000000165000001180C048E07.jpg" manifest:media-type="image/jpeg"/>
  <manifest:file-entry manifest:full-path="Pictures/10000000000002F4000003B207BA05FE.jpg" manifest:media-type="image/jpeg"/>
  <manifest:file-entry manifest:full-path="Pictures/100000010000024F0000021757A118FB.png" manifest:media-type="image/png"/>
  <manifest:file-entry manifest:full-path="Pictures/10000000000002D3000002937F520326.jpg" manifest:media-type="image/jpeg"/>
  <manifest:file-entry manifest:full-path="Pictures/100000000000004A000000F3C98BDC90.png" manifest:media-type="image/png"/>
  <manifest:file-entry manifest:full-path="Pictures/10000000000003690000012616607B8A.bmp" manifest:media-type="image/bmp"/>
  <manifest:file-entry manifest:full-path="Pictures/10000000000001290000012B4DCD564A.png" manifest:media-type="image/png"/>
  <manifest:file-entry manifest:full-path="Pictures/100000000000043900000177F1C41E9C.png" manifest:media-type="image/png"/>
  <manifest:file-entry manifest:full-path="Pictures/1000000000000162000001B787E4B604.jpg" manifest:media-type="image/jpeg"/>
  <manifest:file-entry manifest:full-path="Pictures/10000000000000DF000000F1144444FB.jpg" manifest:media-type="image/jpeg"/>
  <manifest:file-entry manifest:full-path="Pictures/10000000000000A9000001029C021CF9.jpg" manifest:media-type="image/jpeg"/>
  <manifest:file-entry manifest:full-path="Pictures/10000000000000BC00000059C4FC556F.png" manifest:media-type="image/png"/>
  <manifest:file-entry manifest:full-path="Pictures/1000000000000116000000A29F4BED91.jpg" manifest:media-type="image/jpeg"/>
  <manifest:file-entry manifest:full-path="Pictures/1000000000000243000000FB7B7EE682.jpg" manifest:media-type="image/jpeg"/>
  <manifest:file-entry manifest:full-path="Pictures/1000000000000203000002F406D0479F.jpg" manifest:media-type="image/jpeg"/>
  <manifest:file-entry manifest:full-path="Pictures/10000000000001D600000377D5EE0896.jpg" manifest:media-type="image/jpeg"/>
  <manifest:file-entry manifest:full-path="Pictures/100000000000014E000000EF4212E90E.jpg" manifest:media-type="image/jpeg"/>
  <manifest:file-entry manifest:full-path="Pictures/100000000000016700000177327610DA.png" manifest:media-type="image/png"/>
  <manifest:file-entry manifest:full-path="Pictures/10000000000001BE0000035CE712B76A.jpg" manifest:media-type="image/jpeg"/>
  <manifest:file-entry manifest:full-path="Pictures/10000000000000A9000001653CFBAFCE.jpg" manifest:media-type="image/jpeg"/>
  <manifest:file-entry manifest:full-path="Pictures/10000000000002D5000003AE7D0B7C6A.jpg" manifest:media-type="image/jpeg"/>
  <manifest:file-entry manifest:full-path="Pictures/10000000000002B5000002933094A749.png" manifest:media-type="image/png"/>
  <manifest:file-entry manifest:full-path="Pictures/10000001000002080000025C780E394C.png" manifest:media-type="image/png"/>
  <manifest:file-entry manifest:full-path="Pictures/10000001000002070000025B26C05753.png" manifest:media-type="image/png"/>
  <manifest:file-entry manifest:full-path="Pictures/1000000000000455000001DB5417C40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arSymbol" svg:font-family="StarSymbol"/>
  </office:font-face-decls>
  <office:automatic-styles>
    <style:style style:name="P1" style:family="paragraph" style:parent-style-name="Subtitle">
      <style:text-properties officeooo:rsid="001ad63d" officeooo:paragraph-rsid="001ad63d"/>
    </style:style>
    <style:style style:name="P2" style:family="paragraph" style:parent-style-name="Standard">
      <style:text-properties officeooo:rsid="001ad63d" officeooo:paragraph-rsid="001ad63d"/>
    </style:style>
    <style:style style:name="P3" style:family="paragraph" style:parent-style-name="Standard">
      <style:paragraph-properties fo:break-before="page"/>
      <style:text-properties officeooo:rsid="001ad63d" officeooo:paragraph-rsid="001ad63d"/>
    </style:style>
    <style:style style:name="P4" style:family="paragraph" style:parent-style-name="Title">
      <style:text-properties fo:font-size="22pt" style:font-size-asian="22pt" style:font-size-complex="22pt"/>
    </style:style>
    <style:style style:name="P5" style:family="paragraph" style:parent-style-name="Standard">
      <style:text-properties officeooo:rsid="003c398a" officeooo:paragraph-rsid="003c398a"/>
    </style:style>
    <style:style style:name="P6" style:family="paragraph" style:parent-style-name="Standard">
      <style:paragraph-properties fo:break-before="page"/>
      <style:text-properties officeooo:rsid="003c398a" officeooo:paragraph-rsid="003c398a"/>
    </style:style>
    <style:style style:name="P7" style:family="paragraph" style:parent-style-name="Standard">
      <style:text-properties officeooo:rsid="001ecbd6" officeooo:paragraph-rsid="001ecbd6"/>
    </style:style>
    <style:style style:name="P8" style:family="paragraph" style:parent-style-name="Standard">
      <style:paragraph-properties fo:break-before="page"/>
      <style:text-properties officeooo:rsid="001ecbd6" officeooo:paragraph-rsid="001ecbd6"/>
    </style:style>
    <style:style style:name="P9" style:family="paragraph" style:parent-style-name="Standard">
      <style:text-properties officeooo:rsid="00471017" officeooo:paragraph-rsid="00471017"/>
    </style:style>
    <style:style style:name="P10" style:family="paragraph" style:parent-style-name="Standard">
      <style:text-properties fo:font-size="11pt" officeooo:rsid="005958e7" officeooo:paragraph-rsid="005958e7" style:font-size-asian="11pt" style:font-size-complex="11pt"/>
    </style:style>
    <style:style style:name="P11" style:family="paragraph" style:parent-style-name="Standard">
      <style:text-properties officeooo:rsid="00283b69" officeooo:paragraph-rsid="002bf9e2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Heading_20_3">
      <style:paragraph-properties fo:break-before="page"/>
    </style:style>
    <style:style style:name="P14" style:family="paragraph" style:parent-style-name="Standard" style:list-style-name="L1">
      <style:text-properties officeooo:paragraph-rsid="006acb2c"/>
    </style:style>
    <style:style style:name="P15" style:family="paragraph" style:parent-style-name="Standard" style:list-style-name="L1">
      <style:text-properties officeooo:rsid="001ad63d" officeooo:paragraph-rsid="001bcca1"/>
    </style:style>
    <style:style style:name="P16" style:family="paragraph" style:parent-style-name="Standard" style:list-style-name="L1">
      <style:text-properties officeooo:rsid="001ad63d" officeooo:paragraph-rsid="002a21e8"/>
    </style:style>
    <style:style style:name="P17" style:family="paragraph" style:parent-style-name="Standard" style:list-style-name="L1">
      <style:text-properties officeooo:rsid="001bcca1" officeooo:paragraph-rsid="001bcca1"/>
    </style:style>
    <style:style style:name="P18" style:family="paragraph" style:parent-style-name="Standard" style:list-style-name="L1">
      <style:text-properties officeooo:rsid="002a21e8" officeooo:paragraph-rsid="002a21e8"/>
    </style:style>
    <style:style style:name="P19" style:family="paragraph" style:parent-style-name="Standard" style:list-style-name="L1">
      <style:text-properties officeooo:rsid="001d4fb9" officeooo:paragraph-rsid="001ecbd6"/>
    </style:style>
    <style:style style:name="P20" style:family="paragraph" style:parent-style-name="Standard" style:list-style-name="L1">
      <style:text-properties officeooo:rsid="005ad3d4" officeooo:paragraph-rsid="005ad3d4"/>
    </style:style>
    <style:style style:name="P21" style:family="paragraph" style:parent-style-name="Standard" style:list-style-name="L1">
      <style:text-properties officeooo:rsid="001ecbd6" officeooo:paragraph-rsid="003fa9cb"/>
    </style:style>
    <style:style style:name="P22" style:family="paragraph" style:parent-style-name="Standard" style:list-style-name="L1">
      <style:text-properties officeooo:rsid="001ecbd6" officeooo:paragraph-rsid="0056e1a4"/>
    </style:style>
    <style:style style:name="P23" style:family="paragraph" style:parent-style-name="Standard" style:list-style-name="L1">
      <style:paragraph-properties fo:break-before="page"/>
      <style:text-properties officeooo:rsid="005116f4" officeooo:paragraph-rsid="005116f4"/>
    </style:style>
    <style:style style:name="P24" style:family="paragraph" style:parent-style-name="Standard" style:list-style-name="L1">
      <style:text-properties officeooo:rsid="005116f4" officeooo:paragraph-rsid="005116f4"/>
    </style:style>
    <style:style style:name="P25" style:family="paragraph" style:parent-style-name="Standard" style:list-style-name="L1">
      <style:text-properties officeooo:rsid="005116f4" officeooo:paragraph-rsid="005252f2"/>
    </style:style>
    <style:style style:name="P26" style:family="paragraph" style:parent-style-name="Standard" style:list-style-name="L1">
      <style:text-properties officeooo:rsid="005252f2" officeooo:paragraph-rsid="005252f2"/>
    </style:style>
    <style:style style:name="P27" style:family="paragraph" style:parent-style-name="Standard" style:list-style-name="L1">
      <style:text-properties officeooo:rsid="0021b420" officeooo:paragraph-rsid="0061a6c9"/>
    </style:style>
    <style:style style:name="P28" style:family="paragraph" style:parent-style-name="Standard" style:list-style-name="L1">
      <style:text-properties officeooo:rsid="0021b420" officeooo:paragraph-rsid="004285d7"/>
    </style:style>
    <style:style style:name="P29" style:family="paragraph" style:parent-style-name="Standard" style:list-style-name="L1">
      <style:text-properties officeooo:rsid="0021b420" officeooo:paragraph-rsid="0062b837"/>
    </style:style>
    <style:style style:name="P30" style:family="paragraph" style:parent-style-name="Standard" style:list-style-name="L1">
      <style:paragraph-properties fo:break-before="page"/>
      <style:text-properties officeooo:rsid="00283b69" officeooo:paragraph-rsid="002bf9e2"/>
    </style:style>
    <style:style style:name="P31" style:family="paragraph" style:parent-style-name="Standard" style:list-style-name="L1">
      <style:text-properties officeooo:rsid="00283b69" officeooo:paragraph-rsid="002bf9e2"/>
    </style:style>
    <style:style style:name="P32" style:family="paragraph" style:parent-style-name="Standard" style:list-style-name="L1">
      <style:text-properties officeooo:rsid="00283b69"/>
    </style:style>
    <style:style style:name="P33" style:family="paragraph" style:parent-style-name="Standard" style:list-style-name="L1">
      <style:text-properties officeooo:rsid="00283b69" officeooo:paragraph-rsid="006bac2c"/>
    </style:style>
    <style:style style:name="P34" style:family="paragraph" style:parent-style-name="Standard" style:list-style-name="L1">
      <style:text-properties officeooo:rsid="0032f499" officeooo:paragraph-rsid="0032f499"/>
    </style:style>
    <style:style style:name="P35" style:family="paragraph" style:parent-style-name="Standard" style:list-style-name="L1">
      <style:text-properties officeooo:rsid="0032f499" officeooo:paragraph-rsid="00682e91"/>
    </style:style>
    <style:style style:name="P36" style:family="paragraph" style:parent-style-name="Standard" style:list-style-name="L1">
      <style:text-properties officeooo:rsid="0032f499" officeooo:paragraph-rsid="0035b3ea"/>
    </style:style>
    <style:style style:name="P37" style:family="paragraph" style:parent-style-name="Standard" style:list-style-name="L1">
      <style:text-properties officeooo:rsid="0032f499" officeooo:paragraph-rsid="0036fe3c"/>
    </style:style>
    <style:style style:name="P38" style:family="paragraph" style:parent-style-name="Standard" style:list-style-name="L1">
      <style:text-properties officeooo:rsid="003456fd" officeooo:paragraph-rsid="003456fd"/>
    </style:style>
    <style:style style:name="P39" style:family="paragraph" style:parent-style-name="Standard" style:list-style-name="L1">
      <style:paragraph-properties fo:break-before="page"/>
      <style:text-properties officeooo:rsid="003676dc" officeooo:paragraph-rsid="003676dc"/>
    </style:style>
    <style:style style:name="P40" style:family="paragraph" style:parent-style-name="Standard" style:list-style-name="L1">
      <style:text-properties officeooo:rsid="003676dc" officeooo:paragraph-rsid="003676dc"/>
    </style:style>
    <style:style style:name="P41" style:family="paragraph" style:parent-style-name="Standard" style:list-style-name="L1">
      <style:text-properties officeooo:rsid="003676dc" officeooo:paragraph-rsid="0036fe3c"/>
    </style:style>
    <style:style style:name="P42" style:family="paragraph" style:parent-style-name="Standard" style:list-style-name="L1">
      <style:text-properties officeooo:rsid="006a4f36" officeooo:paragraph-rsid="006a4f36"/>
    </style:style>
    <style:style style:name="P43" style:family="paragraph">
      <loext:graphic-properties draw:fill="none" draw:fill-color="#ffffff"/>
      <style:text-properties style:font-name="Arial1"/>
    </style:style>
    <style:style style:name="T1" style:family="text">
      <style:text-properties officeooo:rsid="001bcca1"/>
    </style:style>
    <style:style style:name="T2" style:family="text">
      <style:text-properties officeooo:rsid="00202053"/>
    </style:style>
    <style:style style:name="T3" style:family="text">
      <style:text-properties officeooo:rsid="0021ac4e"/>
    </style:style>
    <style:style style:name="T4" style:family="text">
      <style:text-properties officeooo:rsid="002226c0"/>
    </style:style>
    <style:style style:name="T5" style:family="text">
      <style:text-properties officeooo:rsid="002402bf"/>
    </style:style>
    <style:style style:name="T6" style:family="text">
      <style:text-properties officeooo:rsid="002536c8"/>
    </style:style>
    <style:style style:name="T7" style:family="text">
      <style:text-properties officeooo:rsid="002a21e8"/>
    </style:style>
    <style:style style:name="T8" style:family="text">
      <style:text-properties officeooo:rsid="002bf9e2"/>
    </style:style>
    <style:style style:name="T9" style:family="text">
      <style:text-properties style:text-position="super 58%" officeooo:rsid="002bf9e2"/>
    </style:style>
    <style:style style:name="T10" style:family="text">
      <style:text-properties style:text-position="super 58%" officeooo:rsid="002ce3d3"/>
    </style:style>
    <style:style style:name="T11" style:family="text">
      <style:text-properties style:text-position="super 58%" officeooo:rsid="002fa24d"/>
    </style:style>
    <style:style style:name="T12" style:family="text">
      <style:text-properties officeooo:rsid="002ce3d3"/>
    </style:style>
    <style:style style:name="T13" style:family="text">
      <style:text-properties officeooo:rsid="002ec2a5"/>
    </style:style>
    <style:style style:name="T14" style:family="text">
      <style:text-properties officeooo:rsid="002fa24d"/>
    </style:style>
    <style:style style:name="T15" style:family="text">
      <style:text-properties officeooo:rsid="00318a4f"/>
    </style:style>
    <style:style style:name="T16" style:family="text">
      <style:text-properties officeooo:rsid="003456fd"/>
    </style:style>
    <style:style style:name="T17" style:family="text">
      <style:text-properties officeooo:rsid="003676dc"/>
    </style:style>
    <style:style style:name="T18" style:family="text">
      <style:text-properties officeooo:rsid="003c398a"/>
    </style:style>
    <style:style style:name="T19" style:family="text">
      <style:text-properties officeooo:rsid="0021b420"/>
    </style:style>
    <style:style style:name="T20" style:family="text">
      <style:text-properties officeooo:rsid="003d931f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6pt" officeooo:rsid="002226c0" style:font-size-asian="16pt" style:font-size-complex="16pt"/>
    </style:style>
    <style:style style:name="T23" style:family="text">
      <style:text-properties fo:font-size="16pt" officeooo:rsid="001bcca1" style:font-size-asian="16pt" style:font-size-complex="16pt"/>
    </style:style>
    <style:style style:name="T24" style:family="text">
      <style:text-properties fo:font-size="16pt" officeooo:rsid="003c398a" style:font-size-asian="16pt" style:font-size-complex="16pt"/>
    </style:style>
    <style:style style:name="T25" style:family="text">
      <style:text-properties fo:font-style="italic" officeooo:rsid="003f5542" style:font-style-asian="italic" style:font-style-complex="italic"/>
    </style:style>
    <style:style style:name="T26" style:family="text">
      <style:text-properties officeooo:rsid="003fa9cb"/>
    </style:style>
    <style:style style:name="T27" style:family="text">
      <style:text-properties officeooo:rsid="00425061"/>
    </style:style>
    <style:style style:name="T28" style:family="text">
      <style:text-properties officeooo:rsid="0049bc6b"/>
    </style:style>
    <style:style style:name="T29" style:family="text">
      <style:text-properties officeooo:rsid="004e0dab"/>
    </style:style>
    <style:style style:name="T30" style:family="text">
      <style:text-properties officeooo:rsid="005252f2"/>
    </style:style>
    <style:style style:name="T31" style:family="text">
      <style:text-properties officeooo:rsid="0053460e"/>
    </style:style>
    <style:style style:name="T32" style:family="text">
      <style:text-properties officeooo:rsid="0054ea47"/>
    </style:style>
    <style:style style:name="T33" style:family="text">
      <style:text-properties officeooo:rsid="0056e1a4"/>
    </style:style>
    <style:style style:name="T34" style:family="text">
      <style:text-properties officeooo:rsid="0058225d"/>
    </style:style>
    <style:style style:name="T35" style:family="text">
      <style:text-properties fo:font-size="10pt" officeooo:rsid="0058225d" style:font-size-asian="10pt" style:font-size-complex="10pt"/>
    </style:style>
    <style:style style:name="T36" style:family="text">
      <style:text-properties fo:font-size="10pt" officeooo:rsid="005d0bfa" style:font-size-asian="10pt" style:font-size-complex="10pt"/>
    </style:style>
    <style:style style:name="T37" style:family="text">
      <style:text-properties fo:font-size="10pt" officeooo:rsid="005e851c" style:font-size-asian="10pt" style:font-size-complex="10pt"/>
    </style:style>
    <style:style style:name="T38" style:family="text">
      <style:text-properties fo:font-size="10pt" officeooo:rsid="00607082" style:font-size-asian="10pt" style:font-size-complex="10pt"/>
    </style:style>
    <style:style style:name="T39" style:family="text">
      <style:text-properties fo:font-size="10pt" officeooo:rsid="00619ca4" style:font-size-asian="10pt" style:font-size-complex="10pt"/>
    </style:style>
    <style:style style:name="T40" style:family="text">
      <style:text-properties officeooo:rsid="0061a6c9"/>
    </style:style>
    <style:style style:name="T41" style:family="text">
      <style:text-properties officeooo:rsid="0062b837"/>
    </style:style>
    <style:style style:name="T42" style:family="text">
      <style:text-properties officeooo:rsid="0062d8a9"/>
    </style:style>
    <style:style style:name="T43" style:family="text">
      <style:text-properties officeooo:rsid="006426e3"/>
    </style:style>
    <style:style style:name="T44" style:family="text">
      <style:text-properties officeooo:rsid="0066b12b"/>
    </style:style>
    <style:style style:name="T45" style:family="text">
      <style:text-properties officeooo:rsid="00682e91"/>
    </style:style>
    <style:style style:name="T46" style:family="text">
      <style:text-properties officeooo:rsid="0069acdc"/>
    </style:style>
    <style:style style:name="T47" style:family="text">
      <style:text-properties officeooo:rsid="006acb2c"/>
    </style:style>
    <style:style style:name="T48" style:family="text">
      <style:text-properties fo:font-weight="bold" officeooo:rsid="002ec2a5" style:font-weight-asian="bold" style:font-weight-complex="bold"/>
    </style:style>
    <style:style style:name="T49" style:family="text">
      <style:text-properties fo:font-weight="bold" officeooo:rsid="002fa24d" style:font-weight-asian="bold" style:font-weight-complex="bold"/>
    </style:style>
    <style:style style:name="T50" style:family="text">
      <style:text-properties officeooo:rsid="006bac2c"/>
    </style:style>
    <style:style style:name="T51" style:family="text">
      <style:text-properties style:font-name="Arial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)" style:num-prefix=" 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3%)" style:num-prefix=" 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 %4%)" style:num-prefix=" 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0.2311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readboard Keyer Demo for ARROW Field Day</text:p>
      <text:p text:style-name="P1">A Morse Code Practice Keyer Kit</text:p>
      <text:p text:style-name="P2"><draw:frame draw:style-name="fr4" draw:name="Image10" text:anchor-type="char" svg:x="1.028in" svg:y="0.1854in" svg:width="3.852in" svg:height="4.8201in" draw:z-index="10"><draw:image xlink:href="Pictures/10000000000002F4000003B207BA05FE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© 2026 AC8ES</text:p>
      <text:p text:style-name="P3"/>
      <text:list text:style-name="L1">
        <text:list-item>
          <text:p text:style-name="P15">Parts</text:p>
          <text:list>
            <text:list-item>
              <text:p text:style-name="P17">3x jumper wires <text:span text:style-name="T31">(colors may vary)</text:span></text:p>
            </text:list-item>
            <text:list-item>
              <text:p text:style-name="P17">1x solderless breadboard</text:p>
            </text:list-item>
            <text:list-item>
              <text:p text:style-name="P17">1x mini speaker</text:p>
            </text:list-item>
            <text:list-item>
              <text:p text:style-name="P17">1x USB power connector module</text:p>
            </text:list-item>
            <text:list-item>
              <text:p text:style-name="P17">1x touch sensor</text:p>
            </text:list-item>
            <text:list-item>
              <text:p text:style-name="P16"><text:span text:style-name="T1">1x tone generator<text:line-break/></text:span><draw:frame draw:style-name="fr4" draw:name="Image1" text:anchor-type="char" svg:x="0.4374in" svg:y="0.1957in" svg:width="4.6091in" svg:height="4.2008in" draw:z-index="3"><draw:image xlink:href="Pictures/10000000000002D3000002937F520326.jpg" xlink:type="simple" xlink:show="embed" xlink:actuate="onLoad" draw:mime-type="image/jpeg"/></draw:frame><text:span text:style-name="T23">☞</text:span><text:span text:style-name="T1"> </text:span><text:span text:style-name="T44">Parts’ appearances and colors may vary.</text:span></text:p>
            </text:list-item>
            <text:list-item>
              <text:p text:style-name="P18"><text:span text:style-name="T25">not</text:span> included: <text:s/>USB power bank</text:p>
            </text:list-item>
            <text:list-item>
              <text:p text:style-name="P16"><text:span text:style-name="T25">not</text:span><text:span text:style-name="T7"> included: <text:s/>USB power cable</text:span><text:span text:style-name="T1"><text:line-break/></text:span></text:p>
            </text:list-item>
          </text:list>
        </text:list-item>
        <text:list-item>
          <text:p text:style-name="P19">What is a solderless breadboard?</text:p>
          <text:list>
            <text:list-item>
              <text:p text:style-name="P19"><draw:frame text:anchor-type="char" draw:z-index="0" draw:name="Text Frame 1" draw:style-name="gr1" draw:text-style-name="P43" svg:width="1.5496in" svg:height="0.2315in" draw:transform="rotate (1.5707963267949) translate (4.56666666666667in 2.47986111111111in)"><draw:text-box><text:p><text:span text:style-name="T51">In the “old days”</text:span></text:p></draw:text-box></draw:frame><text:span text:style-name="T27">It </text:span><text:span text:style-name="T32">let’s you </text:span><text:span text:style-name="T27">e</text:span>asily mount components and connect them together. <text:s/>Each vertical section of five holes are electrically connected <text:span text:style-name="T3">via</text:span> a metal strip inside. <text:s/><text:span text:style-name="T29">There is no connection between adjacent </text:span><text:span text:style-name="T32">metal </text:span><text:span text:style-name="T29">st</text:span><draw:frame draw:style-name="fr8" draw:name="Image2" text:anchor-type="char" svg:x="0.3846in" svg:y="0.6457in" svg:width="2.839in" svg:height="2.2264in" draw:z-index="2"><draw:image xlink:href="Pictures/1000000000000165000001180C048E07.jpg" xlink:type="simple" xlink:show="embed" xlink:actuate="onLoad" draw:mime-type="image/jpeg"/></draw:frame><text:span text:style-name="T29">r</text:span><draw:frame draw:style-name="fr8" draw:name="Image3" text:anchor-type="char" svg:x="3.3602in" svg:y="0.8409in" svg:width="0.6291in" svg:height="2.0654in" draw:z-index="4"><draw:image xlink:href="Pictures/100000000000004A000000F3C98BDC90.png" xlink:type="simple" xlink:show="embed" xlink:actuate="onLoad" draw:mime-type="image/png"/></draw:frame><text:span text:style-name="T29">i</text:span><draw:frame draw:style-name="fr4" draw:name="Image29" text:anchor-type="char" svg:x="4.8453in" svg:y="0.9in" svg:width="1.9929in" svg:height="2.0071in" draw:z-index="29"><draw:image xlink:href="Pictures/10000000000001290000012B4DCD564A.png" xlink:type="simple" xlink:show="embed" xlink:actuate="onLoad" draw:mime-type="image/png"/></draw:frame><text:span text:style-name="T29">ps.</text:span></text:p>
              <text:p text:style-name="P20"><text:soft-page-break/><text:span text:style-name="T33">Why the term “breadboard”?<text:line-break/>- </text:span><text:span text:style-name="T34">From</text:span><text:span text:style-name="T33"> the 1920’s, people </text:span><text:span text:style-name="T34">screwed wire clips and vacuum tubes (sockets) and other components</text:span><text:span text:style-name="T33"> </text:span><text:span text:style-name="T34">to actual wooden breadboards to build circuits.</text:span><text:line-break/>(<text:span text:style-name="T36">image</text:span><text:span text:style-name="T39">s</text:span><text:span text:style-name="T36"> f</text:span><text:span text:style-name="T35">rom </text:span><text:a xlink:type="simple" xlink:href="https://www.facebook.com/groups/ARNewsline/posts/10158915416309210" text:style-name="Internet_20_link" text:visited-style-name="Visited_20_Internet_20_Link"><text:span text:style-name="T35">https://www.facebook.com/groups/ARNewsline/posts/10158915416309210</text:span></text:a><text:span text:style-name="T35">, </text:span><text:a xlink:type="simple" xlink:href="https://www.ebay.com/itm/253106065602" text:style-name="Internet_20_link" text:visited-style-name="Visited_20_Internet_20_Link"><text:span text:style-name="T35">https://www.ebay.com/itm/253106065602</text:span></text:a>)</text:p>
            </text:list-item>
            <text:list-item>
              <text:p text:style-name="P21">Each component or jumper wire has a pin that can plug into a hole into the breadboard.</text:p>
            </text:list-item>
          </text:list>
        </text:list-item>
      </text:list>
      <text:p text:style-name="P7"><draw:frame draw:style-name="fr4" draw:name="Image4" text:anchor-type="char" svg:x="0.5417in" svg:y="0.0752in" svg:width="6.4252in" svg:height="2.2283in" draw:z-index="5"><draw:image xlink:href="Pictures/100000000000043900000177F1C41E9C.png" xlink:type="simple" xlink:show="embed" xlink:actuate="onLoad" draw:mime-type="image/png"/></draw:frame></text:p>
      <text:list text:continue-numbering="true" text:style-name="L1">
        <text:list-item>
          <text:list>
            <text:list-item>
              <text:p text:style-name="P22"><draw:frame draw:style-name="fr4" draw:name="Image5" text:anchor-type="char" svg:x="0.6717in" svg:y="0.5835in" svg:width="4.5102in" svg:height="2.8173in" draw:z-index="6"><draw:image xlink:href="Pictures/100000000000011D000000B2FCB53790.png" xlink:type="simple" xlink:show="embed" xlink:actuate="onLoad" draw:mime-type="image/png"/></draw:frame><text:span text:style-name="T2">Here, the pins labeled “GND”, “G”, and “G” are all connected.<text:line-break/>- The black jumper wire </text:span><text:span text:style-name="T26">connects</text:span><text:span text:style-name="T2"> the pins labeled “G”.</text:span><text:line-break/>- <text:span text:style-name="T2">The breadboard itself connects “GND” to “G”.</text:span><text:span text:style-name="T34"><text:line-break/></text:span><text:line-break/></text:p>
            </text:list-item>
          </text:list>
        </text:list-item>
        <text:list-item>
          <text:p text:style-name="P23"><text:span text:style-name="T33">Keyer </text:span>Block Diagram</text:p>
          <text:list>
            <text:list-item>
              <text:p text:style-name="P24">P<draw:frame draw:style-name="fr4" draw:name="Image27" text:anchor-type="char" svg:x="-0.1772in" svg:y="1.1165in" svg:width="7.1819in" svg:height="2.4181in" draw:z-index="28"><draw:image xlink:href="Pictures/10000000000003690000012616607B8A.bmp" xlink:type="simple" xlink:show="embed" xlink:actuate="onLoad" draw:mime-type="image/bmp"/></draw:frame>ower comes from an external USB power bank.</text:p>
            </text:list-item>
            <text:list-item>
              <text:p text:style-name="P24">This 5 volts powers the touch sensor-- it doesn’t directly power anything else!</text:p>
            </text:list-item>
            <text:list-item>
              <text:p text:style-name="P26">When the sensor is touched, its output <text:span text:style-name="T40">supplies power to </text:span>the tone generator, <text:span text:style-name="T40">which turns it on</text:span>.</text:p>
            </text:list-item>
            <text:list-item>
              <text:p text:style-name="P25"><text:span text:style-name="T30">The tone generator output drives the mini speaker.</text:span><text:line-break/><text:line-break/><text:span text:style-name="T37">(</text:span><text:span text:style-name="T39">images from</text:span><text:span text:style-name="T38">: <text:s/></text:span><text:span text:style-name="T37">USB: <text:s/></text:span><text:a xlink:type="simple" xlink:href="https://www.pololu.com/product/2586" text:style-name="Internet_20_link" text:visited-style-name="Visited_20_Internet_20_Link"><text:span text:style-name="T37">https://www.pololu.com/product/2586</text:span></text:a><text:span text:style-name="T37">, touch: <text:s/></text:span><text:a xlink:type="simple" xlink:href="https://wled.discourse.group/t/sp511e-ttp223-touchpad-tutorial/8725" text:style-name="Internet_20_link" text:visited-style-name="Visited_20_Internet_20_Link"><text:span text:style-name="T37">https://wled.discourse.group/t/sp511e-ttp223-touchpad-tutorial/8725</text:span></text:a><text:span text:style-name="T37">, 555: </text:span><text:a xlink:type="simple" xlink:href="https://rhoelect.gr/product/ne555-timer-module-yl-107/" text:style-name="Internet_20_link" text:visited-style-name="Visited_20_Internet_20_Link"><text:span text:style-name="T37">https://rhoelect.gr/product/ne555-timer-module-yl-107/</text:span></text:a><text:span text:style-name="T37">, </text:span><text:span text:style-name="T38">speaker: <text:s/></text:span><text:a xlink:type="simple" xlink:href="https://www.aliexpress.us/item/3256809353431502.html" text:style-name="Internet_20_link" text:visited-style-name="Visited_20_Internet_20_Link"><text:span text:style-name="T38">https://www.aliexpress.us/item/3256809353431502.html</text:span></text:a><text:span text:style-name="T38">) </text:span><text:line-break/><text:line-break/><text:line-break/><text:line-break/><text:line-break/><text:line-break/></text:p>
            </text:list-item>
          </text:list>
        </text:list-item>
      </text:list>
      <text:p text:style-name="P8"/>
      <text:list text:continue-numbering="true" text:style-name="L1">
        <text:list-item>
          <text:p text:style-name="P14"><text:span text:style-name="T19">Start</text:span><draw:frame draw:style-name="fr4" draw:name="Image6" text:anchor-type="char" svg:x="0.6189in" svg:y="0.2882in" svg:width="2.0217in" svg:height="2.5071in" draw:z-index="7"><draw:image xlink:href="Pictures/1000000000000162000001B787E4B604.jpg" xlink:type="simple" xlink:show="embed" xlink:actuate="onLoad" draw:mime-type="image/jpeg"/></draw:frame><text:span text:style-name="T19"> assembly by mounting the modules </text:span><text:span text:style-name="T33">onto the breadboard</text:span><text:span text:style-name="T19">.<text:line-break/></text:span><text:span text:style-name="T21">☞</text:span> <text:span text:style-name="T18">Refer to </text:span><text:a xlink:type="simple" xlink:href="#Appendix-PictorialLayout" text:style-name="Internet_20_link" text:visited-style-name="Visited_20_Internet_20_Link"><text:span text:style-name="T18">Appendix: <text:s/></text:span><text:span text:style-name="T20">Pictorial Layout</text:span></text:a><text:span text:style-name="T18"> for a pictographic layout.<text:line-break/></text:span><text:span text:style-name="T24">☞</text:span><text:span text:style-name="T18"> </text:span><text:span text:style-name="T47">These directions build the “Passive buzzer” variant in</text:span><text:span text:style-name="T18"> </text:span><text:a xlink:type="simple" xlink:href="#AppendixSchematicVariations" text:style-name="Internet_20_link" text:visited-style-name="Visited_20_Internet_20_Link"><text:span text:style-name="T47">Appendix: <text:s/>Schematic Variations</text:span></text:a><text:span text:style-name="T47">; a slightly simpler version can be built if an “active buzzer” is available.</text:span></text:p>
          <text:list>
            <text:list-item>
              <text:p text:style-name="P27">Mount the tone generator-- “<text:span text:style-name="T5">parts </text:span>upside down”-- with the pins in the bottom row. <text:s/>The pin on the left, “O”, <text:span text:style-name="T4">should be in the fourth column.<text:line-break/></text:span><text:span text:style-name="T22">☞</text:span><draw:frame draw:style-name="fr4" draw:name="Image23" text:anchor-type="char" svg:x="1.3374in" svg:y="0.9189in" svg:width="2.3472in" svg:height="3.5835in" draw:z-index="24"><draw:image xlink:href="Pictures/10000000000000A9000001029C021CF9.jpg" xlink:type="simple" xlink:show="embed" xlink:actuate="onLoad" draw:mime-type="image/jpeg"/></draw:frame><text:span text:style-name="T4"> </text:span><text:span text:style-name="T40">It </text:span><draw:frame draw:style-name="fr7" draw:name="Image28" text:anchor-type="char" svg:x="4.2283in" svg:y="0.2346in" svg:width="2.322in" svg:height="1.0992in" draw:z-index="1"><draw:image xlink:href="Pictures/10000000000000BC00000059C4FC556F.png" xlink:type="simple" xlink:show="embed" xlink:actuate="onLoad" draw:mime-type="image/png"/></draw:frame><text:span text:style-name="T40">will be helpful to mark the pins as shown: </text:span><text:span text:style-name="T4"><text:line-break/><text:line-break/></text:span></text:p>
            </text:list-item>
            <text:list-item>
              <text:p text:style-name="P28"><text:soft-page-break/><text:span text:style-name="T4">Mount the USB connector module, “</text:span><text:span text:style-name="T5">parts on top”,</text:span><text:span text:style-name="T4"> in the top row of the bottom half of the breadboard. Its left-most pin, “GND”, should also be in the fourth row. <text:s/>This way, “GND” and </text:span><draw:frame draw:style-name="fr4" draw:name="Image7" text:anchor-type="char" svg:x="0.9492in" svg:y="0.6063in" svg:width="2.3598in" svg:height="2.3in" draw:z-index="8"><draw:image xlink:href="Pictures/1000000000000086000000821FC5353C.jpg" xlink:type="simple" xlink:show="embed" xlink:actuate="onLoad" draw:mime-type="image/jpeg"/></draw:frame><text:span text:style-name="T4">“G” are connected </text:span><text:span text:style-name="T47">via</text:span><text:span text:style-name="T4"> the metal strip inside the breadboard.<text:line-break/></text:span></text:p>
            </text:list-item>
            <text:list-item>
              <text:p text:style-name="P29"><text:span text:style-name="T6">Mount the touch module, “parts upside down”, on the bottom row, next to the tone generator.<text:line-break/></text:span><text:span text:style-name="T22">☞</text:span><draw:frame draw:style-name="fr4" draw:name="Image8" text:anchor-type="char" svg:x="1.761in" svg:y="0.911in" svg:width="3.7272in" svg:height="1.6154in" draw:z-index="23"><draw:image xlink:href="Pictures/1000000000000243000000FB7B7EE682.jpg" xlink:type="simple" xlink:show="embed" xlink:actuate="onLoad" draw:mime-type="image/jpeg"/></draw:frame><text:span text:style-name="T4"> </text:span><text:span text:style-name="T41">Again, i</text:span><text:span text:style-name="T40">t will be helpful to mark the pins as shown:</text:span></text:p>
            </text:list-item>
          </text:list>
        </text:list-item>
      </text:list>
      <text:p text:style-name="P11"/>
      <text:list text:continue-numbering="true" text:style-name="L1">
        <text:list-item>
          <text:p text:style-name="P30">Add jumper wires.</text:p>
          <text:list>
            <text:list-item>
              <text:p text:style-name="P31"><text:span text:style-name="T8">Using the 2</text:span><text:span text:style-name="T9">nd</text:span><text:span text:style-name="T8"> row of the breadboard’s bottom half, connect a jumper wire from “GND” </text:span><draw:frame draw:style-name="fr4" draw:name="Image9" text:anchor-type="char" svg:x="0.1508in" svg:y="0.4752in" svg:width="2.9783in" svg:height="4.372in" draw:z-index="9"><draw:image xlink:href="Pictures/1000000000000203000002F406D0479F.jpg" xlink:type="simple" xlink:show="embed" xlink:actuate="onLoad" draw:mime-type="image/jpeg"/></draw:frame><text:span text:style-name="T8">(USB mo</text:span><draw:frame draw:style-name="fr4" draw:name="Image11" text:anchor-type="char" svg:x="3.1917in" svg:y="1.4791in" svg:width="3.9583in" svg:height="2.472in" draw:z-index="11"><draw:image xlink:href="Pictures/100000000000011D000000B2FCB53790.png" xlink:type="simple" xlink:show="embed" xlink:actuate="onLoad" draw:mime-type="image/png"/></draw:frame><text:span text:style-name="T8">dule) to “G” of the touch module.<text:line-break/><text:line-break/><text:line-break/><text:line-break/><text:line-break/><text:line-break/><text:line-break/></text:span><text:line-break/><text:line-break/></text:p>
            </text:list-item>
            <text:list-item>
              <text:p text:style-name="P32"><text:soft-page-break/><text:span text:style-name="T8">Using the </text:span><text:span text:style-name="T12">3</text:span><text:span text:style-name="T10">rd</text:span><text:span text:style-name="T12"> </text:span><text:span text:style-name="T8">row of the breadboard’s bottom half, connect a jumper wire from “</text:span><text:span text:style-name="T13">VBUS” (US</text:span><draw:frame draw:style-name="fr4" draw:name="Image12" text:anchor-type="char" svg:x="0.6161in" svg:y="0.5311in" svg:width="1.8752in" svg:height="3.5346in" draw:z-index="12"><draw:image xlink:href="Pictures/10000000000001D600000377D5EE0896.jpg" xlink:type="simple" xlink:show="embed" xlink:actuate="onLoad" draw:mime-type="image/jpeg"/></draw:frame><text:span text:style-name="T13">B module) to “</text:span><text:span text:style-name="T48">+</text:span><text:span text:style-name="T13">”</text:span><draw:frame draw:style-name="fr4" draw:name="Image13" text:anchor-type="char" svg:x="2.6717in" svg:y="0.4681in" svg:width="4.5563in" svg:height="3.2602in" draw:z-index="13"><draw:image xlink:href="Pictures/100000000000014E000000EF4212E90E.jpg" xlink:type="simple" xlink:show="embed" xlink:actuate="onLoad" draw:mime-type="image/jpeg"/></draw:frame><text:span text:style-name="T13"> of the touch module.<text:line-break/></text:span><text:span text:style-name="T22">☞</text:span><text:span text:style-name="T4"> </text:span><text:span text:style-name="T42">The USB module you have may differ from what’s shown. <text:s/>Just </text:span><text:span text:style-name="T43">connect “VBUS” or “V” or the equivalent pin</text:span><draw:frame draw:style-name="fr6" draw:name="Image30" text:anchor-type="char" svg:x="6.2984in" svg:y="3.2189in" svg:width="1.3909in" svg:height="1.4528in" draw:z-index="30"><draw:image xlink:href="Pictures/100000000000016700000177327610DA.png" xlink:type="simple" xlink:show="embed" xlink:actuate="onLoad" draw:mime-type="image/png"/></draw:frame><text:span text:style-name="T43">.</text:span><text:span text:style-name="T42"><text:line-break/></text:span></text:p>
            </text:list-item>
            <text:list-item>
              <text:p text:style-name="P33"><text:span text:style-name="T8">Using the </text:span><text:span text:style-name="T14">4</text:span><text:span text:style-name="T11">th</text:span><text:span text:style-name="T14"> </text:span><text:span text:style-name="T8">row of the breadboard’s bottom half, connect a jumper wire from “</text:span><text:span text:style-name="T49">+</text:span><text:span text:style-name="T14">” </text:span><text:span text:style-name="T15">(</text:span><text:span text:style-name="T14">tone generator module) to “O” of the touch module.<text:line-break/></text:span><text:span text:style-name="T22">☞</text:span><text:span text:style-name="T4"> </text:span><text:span text:style-name="T50">Re</text:span><draw:frame draw:style-name="fr4" draw:name="Image14" text:anchor-type="char" svg:x="0.7791in" svg:y="0.6854in" svg:width="1.7882in" svg:height="3.4492in" draw:z-index="20"><draw:image xlink:href="Pictures/10000000000001BE0000035CE712B76A.jpg" xlink:type="simple" xlink:show="embed" xlink:actuate="onLoad" draw:mime-type="image/jpeg"/></draw:frame><text:span text:style-name="T50">me</text:span><draw:frame draw:style-name="fr4" draw:name="Image15" text:anchor-type="char" svg:x="2.6992in" svg:y="0.8839in" svg:width="4.9134in" svg:height="2.8634in" draw:z-index="21"><draw:image xlink:href="Pictures/1000000000000116000000A29F4BED91.jpg" xlink:type="simple" xlink:show="embed" xlink:actuate="onLoad" draw:mime-type="image/jpeg"/></draw:frame><text:span text:style-name="T50">mber, the output of the touch module actually powers the tone generator.</text:span><text:span text:style-name="T14"><text:line-break/><text:line-break/><text:line-break/></text:span></text:p>
            </text:list-item>
          </text:list>
        </text:list-item>
        <text:list-item>
          <text:p text:style-name="P34"><text:soft-page-break/>Add speaker.</text:p>
          <text:list>
            <text:list-item>
              <text:p text:style-name="P35">Again u<text:span text:style-name="T8">sing the </text:span><text:span text:style-name="T14">4</text:span><text:span text:style-name="T11">th</text:span><text:span text:style-name="T14"> </text:span><text:span text:style-name="T8">row of the breadboard’s bottom half, </text:span>connect the speaker’s “G” pin to the “G” breadboard column. <text:line-break/>Connect the speaker’s “O” lead to the “O” pin of the tone generator module.<text:line-break/><draw:frame draw:style-name="fr4" draw:name="Image16" text:anchor-type="char" svg:x="0.8374in" svg:y="0.9201in" svg:width="2in" svg:height="3.6201in" draw:z-index="14"><draw:image xlink:href="Pictures/10000000000001F50000038BF9F5F0D0.jpg" xlink:type="simple" xlink:show="embed" xlink:actuate="onLoad" draw:mime-type="image/jpeg"/></draw:frame><text:span text:style-name="T22">☞</text:span><text:span text:style-name="T4"> </text:span><text:span text:style-name="T45">If the</text:span><draw:frame draw:style-name="fr4" draw:name="Image17" text:anchor-type="char" svg:x="2.9972in" svg:y="0.9701in" svg:width="3.2575in" svg:height="3.5209in" draw:z-index="15"><draw:image xlink:href="Pictures/10000000000000DF000000F1144444FB.jpg" xlink:type="simple" xlink:show="embed" xlink:actuate="onLoad" draw:mime-type="image/jpeg"/></draw:frame><text:span text:style-name="T45"> speaker leads are not marked, then they are interchangeable.</text:span><text:line-break/><text:span text:style-name="T45"> </text:span></text:p>
            </text:list-item>
          </text:list>
        </text:list-item>
        <text:list-item>
          <text:p text:style-name="P38">Connect USB power bank.</text:p>
          <text:list>
            <text:list-item>
              <text:p text:style-name="P38">Make sure the power bank is off.</text:p>
            </text:list-item>
            <text:list-item>
              <text:p text:style-name="P36"><text:span text:style-name="T16">Plug</text:span><draw:frame draw:style-name="fr4" draw:name="Image18" text:anchor-type="char" svg:x="1.0035in" svg:y="0.3016in" svg:width="2.7409in" svg:height="3.4299in" draw:z-index="16"><draw:image xlink:href="Pictures/10000000000002F4000003B207BA05FE.jpg" xlink:type="simple" xlink:show="embed" xlink:actuate="onLoad" draw:mime-type="image/jpeg"/></draw:frame><text:span text:style-name="T16"> </text:span><text:span text:style-name="T46">a</text:span><text:span text:style-name="T16"> USB power cable betw</text:span><draw:frame draw:style-name="fr4" draw:name="Image22" text:anchor-type="char" svg:x="3.9457in" svg:y="0.3437in" svg:width="1.5902in" svg:height="3.3591in" draw:z-index="22"><draw:image xlink:href="Pictures/10000000000000A9000001653CFBAFCE.jpg" xlink:type="simple" xlink:show="embed" xlink:actuate="onLoad" draw:mime-type="image/jpeg"/></draw:frame><text:span text:style-name="T16">een </text:span><text:span text:style-name="T46">a</text:span><text:span text:style-name="T16"> power bank and </text:span><text:span text:style-name="T46">the </text:span><text:span text:style-name="T16">USB module.<text:line-break/></text:span></text:p>
            </text:list-item>
          </text:list>
        </text:list-item>
        <text:list-item>
          <text:p text:style-name="P39">Test!</text:p>
          <text:list>
            <text:list-item>
              <text:p text:style-name="P40">Turn on the power bank.</text:p>
            </text:list-item>
            <text:list-item>
              <text:p text:style-name="P40">Tap the touch module.</text:p>
              <text:list>
                <text:list-item>
                  <text:p text:style-name="P40">The red LED on the touch module’s “part’s side” will light.</text:p>
                </text:list-item>
                <text:list-item>
                  <text:p text:style-name="P41">The speaker will beep-- listen carefully; it’s a bit quiet.</text:p>
                </text:list-item>
              </text:list>
            </text:list-item>
            <text:list-item>
              <text:p text:style-name="P42"><text:span text:style-name="T22">☞</text:span>If the sensor turns on when your finger is hovering just above it, you can <draw:frame draw:style-name="fr4" draw:name="Image19" text:anchor-type="char" svg:x="1.0665in" svg:y="0.4555in" svg:width="2.4484in" svg:height="3.1835in" draw:z-index="17"><draw:image xlink:href="Pictures/10000000000002D5000003AE7D0B7C6A.jpg" xlink:type="simple" xlink:show="embed" xlink:actuate="onLoad" draw:mime-type="image/jpeg"/></draw:frame>affix a small square of cardboard on top of the sensor.<text:line-break/></text:p>
            </text:list-item>
          </text:list>
        </text:list-item>
        <text:list-item>
          <text:p text:style-name="P41">International Morse Code</text:p>
          <text:list>
            <text:list-item>
              <text:list>
                <text:list-item>
                  <text:p text:style-name="P41">The length of a dot is one unit.</text:p>
                </text:list-item>
                <text:list-item>
                  <text:p text:style-name="P41">A dash is three units.</text:p>
                </text:list-item>
                <text:list-item>
                  <text:p text:style-name="P41">The space between parts of the same letter is one unit.</text:p>
                </text:list-item>
                <text:list-item>
                  <text:p text:style-name="P41">The space between letters is three units.</text:p>
                </text:list-item>
                <text:list-item>
                  <text:p text:style-name="P37"><draw:frame draw:style-name="fr5" draw:name="Image20" text:anchor-type="paragraph" svg:x="1.2728in" svg:y="0.3535in" svg:width="3.5134in" svg:height="3.3402in" draw:z-index="18"><draw:image xlink:href="Pictures/10000000000002B5000002933094A749.png" xlink:type="simple" xlink:show="embed" xlink:actuate="onLoad" draw:mime-type="image/png"/></draw:frame><text:s/><text:span text:style-name="T17">The space between words is seven units.</text:span></text:p>
                </text:list-item>
              </text:list>
            </text:list-item>
          </text:list>
        </text:list-item>
      </text:list>
      <text:h text:style-name="Heading_20_3" text:outline-level="3" text:is-list-header="true"><text:soft-page-break/>Appendix<text:bookmark text:name="Appendix-PictorialLayout"/>: <text:s/>Pictorial Layout</text:h>
      <text:p text:style-name="P5"><text:s text:c="2"/><draw:frame draw:style-name="fr4" draw:name="Image21" text:anchor-type="char" svg:x="0.1138in" svg:y="0.4335in" svg:width="6.1827in" svg:height="7.2972in" draw:z-index="19"><draw:image xlink:href="Pictures/10000001000002080000025C780E394C.png" xlink:type="simple" xlink:show="embed" xlink:actuate="onLoad" draw:mime-type="image/png"/></draw:frame><text:s text:c="2"/></text:p>
      <text:p text:style-name="P5"><text:line-break/><text:line-break/><text:line-break/><text:line-break/></text:p>
      <text:p text:style-name="P6"><draw:frame draw:style-name="fr3" draw:name="Image24" text:anchor-type="char" svg:width="5.4083in" svg:height="6.2835in" draw:z-index="25"><draw:image xlink:href="Pictures/10000001000002070000025B26C05753.png" xlink:type="simple" xlink:show="embed" xlink:actuate="onLoad" draw:mime-type="image/png"/></draw:frame><text:line-break/><text:line-break/><text:line-break/></text:p>
      <text:p text:style-name="P6"><text:line-break/> <text:s text:c="2"/><draw:frame draw:style-name="fr2" draw:name="Image26" text:anchor-type="char" svg:x="-0.5209in" svg:y="0in" svg:width="7.7634in" svg:height="3.3252in" draw:z-index="27"><draw:image xlink:href="Pictures/1000000000000455000001DB5417C40C.png" xlink:type="simple" xlink:show="embed" xlink:actuate="onLoad" draw:mime-type="image/png"/></draw:frame><text:line-break/><text:line-break/></text:p>
      <text:h text:style-name="P13" text:outline-level="3"><text:bookmark-start text:name="AppendixSchematicVariations"/>Appendix: <text:s/>Schematic <text:span text:style-name="T28">Variation</text:span>s<text:bookmark-end text:name="AppendixSchematicVariations"/></text:h>
      <text:p text:style-name="P9"><draw:frame draw:style-name="fr1" draw:name="Image25" text:anchor-type="char" svg:width="7.3799in" svg:height="6.6811in" draw:z-index="26"><draw:image xlink:href="Pictures/100000010000024F0000021757A118FB.png" xlink:type="simple" xlink:show="embed" xlink:actuate="onLoad" draw:mime-type="image/png"/></draw:frame><text:line-break/> <text:s text:c="2"/><text:line-break/><text:line-break/><text:line-break/> <text:s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402in" fo:margin-bottom="0.4402in" fo:margin-left="0.4402in" fo:margin-right="0.7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7"/><text:page-number text:select-page="current">14</text:page-number><text:bookmark-end text:name="PageNumWizard_FOOTER_Default Page Style7"/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14T10:53:06.124000000</meta:creation-date>
    <dc:date>2026-06-24T20:27:16.253000000</dc:date>
    <meta:editing-duration>PT19H14M29S</meta:editing-duration>
    <meta:editing-cycles>70</meta:editing-cycles>
    <meta:generator>LibreOffice/24.2.3.2$Windows_X86_64 LibreOffice_project/433d9c2ded56988e8a90e6b2e771ee4e6a5ab2ba</meta:generator>
    <meta:document-statistic meta:table-count="0" meta:image-count="30" meta:object-count="0" meta:page-count="14" meta:paragraph-count="55" meta:word-count="708" meta:character-count="4252" meta:non-whitespace-character-count="3517"/>
  </office:meta>
</office:document-meta>
</file>