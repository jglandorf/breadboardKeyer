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7AC578D.png" manifest:media-type="image/png"/>
  <manifest:file-entry manifest:full-path="Pictures/10000000000003CF0000022DF9DF9D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4572"/>
    </style:style>
    <style:style style:name="P2" style:family="paragraph" style:parent-style-name="Standard">
      <style:text-properties officeooo:rsid="001b4572" officeooo:paragraph-rsid="001bab1e"/>
    </style:style>
    <style:style style:name="P3" style:family="paragraph" style:parent-style-name="Standard">
      <style:text-properties officeooo:rsid="001b4572" officeooo:paragraph-rsid="002569e9"/>
    </style:style>
    <style:style style:name="P4" style:family="paragraph" style:parent-style-name="Standard">
      <style:text-properties officeooo:rsid="001b4572" officeooo:paragraph-rsid="002716e4"/>
    </style:style>
    <style:style style:name="P5" style:family="paragraph" style:parent-style-name="Standard">
      <style:paragraph-properties fo:break-before="page"/>
      <style:text-properties officeooo:rsid="001b4572" officeooo:paragraph-rsid="002716e4"/>
    </style:style>
    <style:style style:name="P6" style:family="paragraph" style:parent-style-name="Standard">
      <style:text-properties fo:font-size="11pt" officeooo:rsid="001b4572" officeooo:paragraph-rsid="001bab1e" style:font-size-asian="11pt" style:font-size-complex="11pt"/>
    </style:style>
    <style:style style:name="P7" style:family="paragraph" style:parent-style-name="Standard">
      <style:text-properties fo:font-size="11pt" officeooo:rsid="001b4572" officeooo:paragraph-rsid="002716e4" style:font-size-asian="11pt" style:font-size-complex="11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2716e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weight="bold" officeooo:rsid="001b4572" style:font-weight-asian="bold" style:font-weight-complex="bold"/>
    </style:style>
    <style:style style:name="P11" style:family="paragraph" style:parent-style-name="Standard">
      <style:text-properties fo:font-weight="bold" officeooo:rsid="001b4572" officeooo:paragraph-rsid="002716e4" style:font-weight-asian="bold" style:font-weight-complex="bold"/>
    </style:style>
    <style:style style:name="P12" style:family="paragraph" style:parent-style-name="Standard">
      <style:text-properties fo:font-weight="bold" officeooo:rsid="001bab1e" officeooo:paragraph-rsid="001bab1e" style:font-weight-asian="bold" style:font-weight-complex="bold"/>
    </style:style>
    <style:style style:name="P13" style:family="paragraph" style:parent-style-name="Standard">
      <style:text-properties fo:font-weight="bold" officeooo:rsid="001bab1e" officeooo:paragraph-rsid="002716e4" style:font-weight-asian="bold" style:font-weight-complex="bold"/>
    </style:style>
    <style:style style:name="P14" style:family="paragraph" style:parent-style-name="Standard">
      <style:text-properties fo:font-size="13pt" fo:font-weight="bold" officeooo:rsid="001b4572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b4572" officeooo:paragraph-rsid="002716e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20b9db"/>
    </style:style>
    <style:style style:name="T3" style:family="text">
      <style:text-properties officeooo:rsid="0020b9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b9db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21028f" style:font-size-asian="11pt" style:font-size-complex="11pt"/>
    </style:style>
    <style:style style:name="T8" style:family="text">
      <style:text-properties fo:font-size="11pt" fo:font-weight="normal" officeooo:rsid="002569e9" style:font-size-asian="11pt" style:font-weight-asian="normal" style:font-size-complex="11pt" style:font-weight-complex="normal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5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2" text:anchor-type="page" text:anchor-page-number="2" svg:x="4.25in" svg:y="0.5in" svg:width="3.5in" svg:height="2in" draw:z-index="22">
        <draw:text-box>
          <text:p text:style-name="P4"/>
          <text:p text:style-name="P4"><draw:frame text:anchor-type="paragraph" draw:z-index="60" draw:name="Text Frame 2" draw:style-name="gr1" draw:text-style-name="P18" svg:width="1.0157in" svg:height="0.1953in" draw:transform="rotate (1.5707963267949) translate (3.08958333333333in 1.18194444444444in)"><draw:text-box><text:p text:style-name="P17"><text:span text:style-name="T6">Field Day!</text:span></text:p></draw:text-box></draw:frame><draw:frame draw:style-name="fr2" draw:name="Image1 Copy 1 Copy 1" text:anchor-type="char" svg:x="2in" svg:y="-0.0402in" svg:width="1.4in" svg:height="1.4in" draw:z-index="23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1" text:anchor-type="char" svg:x="0.0402in" svg:y="-0.3in" svg:width="3.3598in" svg:height="1.9201in" draw:z-index="48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2" draw:name="Text Frame 4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20" text:anchor-type="page" text:anchor-page-number="2" svg:x="4.25in" svg:y="8.5in" svg:width="3.5in" svg:height="2in" draw:z-index="47">
        <draw:text-box>
          <text:p text:style-name="P4"/>
          <text:p text:style-name="P4"><draw:frame draw:style-name="fr2" draw:name="Image1 Copy 9 Copy 1" text:anchor-type="char" svg:x="2in" svg:y="-0.0402in" svg:width="1.4in" svg:height="1.4in" draw:z-index="49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8" text:anchor-type="char" svg:x="0.0402in" svg:y="-0.3in" svg:width="3.3598in" svg:height="1.9201in" draw:z-index="57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  <text:p text:style-name="P5"/>
        </draw:text-box>
      </draw:frame>
      <draw:frame draw:style-name="fr1" draw:name="Frame19" text:anchor-type="page" text:anchor-page-number="2" svg:x="0.75in" svg:y="8.5in" svg:width="3.5in" svg:height="2in" draw:z-index="45">
        <draw:text-box>
          <text:p text:style-name="P4"/>
          <text:p text:style-name="P4"><draw:frame draw:style-name="fr2" draw:name="Image1 Copy 8 Copy 1" text:anchor-type="char" svg:x="2in" svg:y="-0.0402in" svg:width="1.4in" svg:height="1.4in" draw:z-index="46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9" text:anchor-type="char" svg:x="0.0402in" svg:y="-0.3in" svg:width="3.3598in" svg:height="1.9201in" draw:z-index="58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  <text:p text:style-name="P5"/>
          <text:p text:style-name="P5"/>
        </draw:text-box>
      </draw:frame>
      <draw:frame draw:style-name="fr1" draw:name="Frame18" text:anchor-type="page" text:anchor-page-number="2" svg:x="4.25in" svg:y="6.5in" svg:width="3.5in" svg:height="2in" draw:z-index="42">
        <draw:text-box>
          <text:p text:style-name="P4"/>
          <text:p text:style-name="P4"><draw:frame draw:style-name="fr2" draw:name="Image1 Copy 7 Copy 1" text:anchor-type="char" svg:x="2in" svg:y="-0.0402in" svg:width="1.4in" svg:height="1.4in" draw:z-index="43"><draw:image xlink:href="Pictures/10000000000000E1000000E1C7AC578D.png" xlink:type="simple" xlink:show="embed" xlink:actuate="onLoad" draw:mime-type="image/png"/></draw:frame><draw:frame draw:style-name="fr2" draw:name="Image1 Copy 14 Copy 1" text:anchor-type="char" svg:x="2in" svg:y="-0.0402in" svg:width="1.4in" svg:height="1.4in" draw:z-index="44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6" text:anchor-type="char" svg:x="0.0402in" svg:y="-0.3in" svg:width="3.3598in" svg:height="1.9201in" draw:z-index="55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8" draw:name="Text Frame 10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7" text:anchor-type="page" text:anchor-page-number="2" svg:x="0.75in" svg:y="6.5in" svg:width="3.5in" svg:height="2in" draw:z-index="39">
        <draw:text-box>
          <text:p text:style-name="P4"/>
          <text:p text:style-name="P4"><draw:frame draw:style-name="fr2" draw:name="Image1 Copy 6 Copy 1" text:anchor-type="char" svg:x="2in" svg:y="-0.0402in" svg:width="1.4in" svg:height="1.4in" draw:z-index="40"><draw:image xlink:href="Pictures/10000000000000E1000000E1C7AC578D.png" xlink:type="simple" xlink:show="embed" xlink:actuate="onLoad" draw:mime-type="image/png"/></draw:frame><draw:frame draw:style-name="fr2" draw:name="Image1 Copy 15 Copy 1" text:anchor-type="char" svg:x="2in" svg:y="-0.0402in" svg:width="1.4in" svg:height="1.4in" draw:z-index="41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7" text:anchor-type="char" svg:x="0.0402in" svg:y="-0.3in" svg:width="3.3598in" svg:height="1.9201in" draw:z-index="56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7" draw:name="Text Frame 9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6" text:anchor-type="page" text:anchor-page-number="2" svg:x="4.25in" svg:y="4.5in" svg:width="3.5in" svg:height="2in" draw:z-index="36">
        <draw:text-box>
          <text:p text:style-name="P4"/>
          <text:p text:style-name="P4"><draw:frame draw:style-name="fr2" draw:name="Image1 Copy 5 Copy 1" text:anchor-type="char" svg:x="2in" svg:y="-0.0402in" svg:width="1.4in" svg:height="1.4in" draw:z-index="37"><draw:image xlink:href="Pictures/10000000000000E1000000E1C7AC578D.png" xlink:type="simple" xlink:show="embed" xlink:actuate="onLoad" draw:mime-type="image/png"/></draw:frame><draw:frame draw:style-name="fr2" draw:name="Image1 Copy 13 Copy 1" text:anchor-type="char" svg:x="2in" svg:y="-0.0402in" svg:width="1.4in" svg:height="1.4in" draw:z-index="38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4" text:anchor-type="char" svg:x="0.0402in" svg:y="-0.3in" svg:width="3.3598in" svg:height="1.9201in" draw:z-index="53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6" draw:name="Text Frame 8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5" text:anchor-type="page" text:anchor-page-number="2" svg:x="0.75in" svg:y="4.5in" svg:width="3.5in" svg:height="2in" draw:z-index="34">
        <draw:text-box>
          <text:p text:style-name="P4"/>
          <text:p text:style-name="P4"><draw:frame draw:style-name="fr2" draw:name="Image1 Copy 4 Copy 1" text:anchor-type="char" svg:x="2in" svg:y="-0.0402in" svg:width="1.4in" svg:height="1.4in" draw:z-index="35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5" text:anchor-type="char" svg:x="0.0402in" svg:y="-0.3in" svg:width="3.3598in" svg:height="1.9201in" draw:z-index="54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5" draw:name="Text Frame 7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4" text:anchor-type="page" text:anchor-page-number="2" svg:x="4.25in" svg:y="2.5in" svg:width="3.5in" svg:height="2in" draw:z-index="31">
        <draw:text-box>
          <text:p text:style-name="P4"/>
          <text:p text:style-name="P4"><draw:frame draw:style-name="fr2" draw:name="Image1 Copy 3 Copy 1" text:anchor-type="char" svg:x="2in" svg:y="-0.0402in" svg:width="1.4in" svg:height="1.4in" draw:z-index="32"><draw:image xlink:href="Pictures/10000000000000E1000000E1C7AC578D.png" xlink:type="simple" xlink:show="embed" xlink:actuate="onLoad" draw:mime-type="image/png"/></draw:frame><draw:frame draw:style-name="fr2" draw:name="Image1 Copy 12 Copy 1" text:anchor-type="char" svg:x="2in" svg:y="-0.0402in" svg:width="1.4in" svg:height="1.4in" draw:z-index="33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3" text:anchor-type="char" svg:x="0.0402in" svg:y="-0.3in" svg:width="3.3598in" svg:height="1.9201in" draw:z-index="52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4" draw:name="Text Frame 6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3" text:anchor-type="page" text:anchor-page-number="2" svg:x="0.75in" svg:y="2.5in" svg:width="3.5in" svg:height="2in" draw:z-index="24">
        <draw:text-box>
          <text:p text:style-name="P4"/>
          <text:p text:style-name="P4"><draw:frame draw:style-name="fr2" draw:name="Image1 Copy 2 Copy 1" text:anchor-type="char" svg:x="2in" svg:y="-0.0402in" svg:width="1.4in" svg:height="1.4in" draw:z-index="25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 Copy 2" text:anchor-type="char" svg:x="0.0402in" svg:y="-0.3in" svg:width="3.3598in" svg:height="1.9201in" draw:z-index="51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><draw:frame text:anchor-type="paragraph" draw:z-index="63" draw:name="Text Frame 5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1" text:anchor-type="page" text:anchor-page-number="2" svg:x="0.75in" svg:y="0.5in" svg:width="3.5in" svg:height="2in" draw:z-index="20">
        <draw:text-box>
          <text:p text:style-name="P1"/>
          <text:p text:style-name="P1"><draw:frame text:anchor-type="paragraph" draw:z-index="59" draw:name="Text Frame 1" draw:style-name="gr1" draw:text-style-name="P18" svg:width="1.0157in" svg:height="0.1953in" draw:transform="rotate (1.5707963267949) translate (3.08958333333333in 1.18194444444444in)"><draw:text-box><text:p text:style-name="P17"><text:span text:style-name="T6">Field Day!</text:span></text:p></draw:text-box></draw:frame><draw:frame draw:style-name="fr2" draw:name="Image1 Copy 10" text:anchor-type="char" svg:x="2in" svg:y="-0.0402in" svg:width="1.4in" svg:height="1.4in" draw:z-index="21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0 Copy 1" text:anchor-type="char" svg:x="0.0402in" svg:y="-0.3in" svg:width="3.3598in" svg:height="1.9201in" draw:z-index="50"><draw:image xlink:href="Pictures/10000000000003CF0000022DF9DF9D51.jpg" xlink:type="simple" xlink:show="embed" xlink:actuate="onLoad" draw:mime-type="image/jpeg"/></draw:frame><text:span text:style-name="T5">ARROW Communication</text:span></text:p>
          <text:p text:style-name="P10"><text:s text:c="24"/><text:span text:style-name="T3">Association</text:span></text:p>
          <text:p text:style-name="P3"><text:s text:c="25"/><text:span text:style-name="T9">w8rp.org</text:span></text:p>
          <text:p text:style-name="P14"><text:s text:c="18"/><text:span text:style-name="T8">Amateur Radio</text:span></text:p>
          <text:p text:style-name="P1"><text:span text:style-name="T6"><text:s text:c="3"/></text:span><text:span text:style-name="T7">monthly meetings &amp; testing</text:span> </text:p>
          <text:p text:style-name="P12"><text:s text:c="7"/><text:span text:style-name="T3">Field Day Breadboard</text:span></text:p>
          <text:p text:style-name="P8"><text:span text:style-name="T1"><text:s text:c="23"/></text:span><text:span text:style-name="T2">Keyer Project:</text:span></text:p>
          <text:p text:style-name="P6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2"><draw:frame text:anchor-type="paragraph" draw:z-index="61" draw:name="Text Frame 3" draw:style-name="gr1" draw:text-style-name="P18" svg:width="1.0157in" svg:height="0.1953in" draw:transform="rotate (1.5707963267949) translate (3.08958333333333in 1.57569444444444in)"><draw:text-box><text:p text:style-name="P17"><text:span text:style-name="T6">Field Day!</text:span></text:p></draw:text-box></draw:frame></text:p>
        </draw:text-box>
      </draw:frame>
      <draw:frame draw:style-name="fr1" draw:name="Frame1" text:anchor-type="page" text:anchor-page-number="1" svg:x="0.75in" svg:y="0.5in" svg:width="3.5in" svg:height="2in" draw:z-index="2">
        <draw:text-box>
          <text:p text:style-name="P1"/>
          <text:p text:style-name="P1"><text:s text:c="2"/><text:span text:style-name="T4"><text:s/></text:span><draw:frame draw:style-name="fr2" draw:name="Image1" text:anchor-type="char" svg:x="2in" svg:y="-0.0402in" svg:width="1.4in" svg:height="1.4in" draw:z-index="13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0"><text:s text:c="24"/><text:span text:style-name="T3">Association</text:span></text:p>
          <text:p text:style-name="P3"><text:s text:c="25"/><text:span text:style-name="T9">w8rp.org</text:span></text:p>
          <text:p text:style-name="P14"><text:s text:c="18"/><text:span text:style-name="T8">Amateur Radio</text:span></text:p>
          <text:p text:style-name="P1"><text:span text:style-name="T6"><text:s text:c="3"/></text:span><text:span text:style-name="T7">monthly meetings &amp; testing</text:span> </text:p>
          <text:p text:style-name="P12"><text:s text:c="7"/><text:span text:style-name="T3">Field Day Breadboard</text:span></text:p>
          <text:p text:style-name="P8"><text:span text:style-name="T1"><text:s text:c="23"/></text:span><text:span text:style-name="T2">Keyer Project:</text:span></text:p>
          <text:p text:style-name="P6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2"/>
        </draw:text-box>
      </draw:frame>
      <draw:frame draw:style-name="fr1" draw:name="Frame2" text:anchor-type="page" text:anchor-page-number="1" svg:x="4.25in" svg:y="0.5in" svg:width="3.5in" svg:height="2in" draw:z-index="14">
        <draw:text-box>
          <text:p text:style-name="P4"/>
          <text:p text:style-name="P4"><draw:frame draw:style-name="fr2" draw:name="Image1 Copy 1" text:anchor-type="char" svg:x="2in" svg:y="-0.0402in" svg:width="1.4in" svg:height="1.4in" draw:z-index="15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1" text:anchor-type="char" svg:x="2in" svg:y="-0.0402in" svg:width="1.4in" svg:height="1.4in" draw:z-index="26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3" text:anchor-type="page" text:anchor-page-number="1" svg:x="0.75in" svg:y="2.5in" svg:width="3.5in" svg:height="2in" draw:z-index="12">
        <draw:text-box>
          <text:p text:style-name="P4"/>
          <text:p text:style-name="P4"><draw:frame draw:style-name="fr2" draw:name="Image1 Copy 2" text:anchor-type="char" svg:x="2in" svg:y="-0.0402in" svg:width="1.4in" svg:height="1.4in" draw:z-index="16"><draw:image xlink:href="Pictures/10000000000000E1000000E1C7AC578D.png" xlink:type="simple" xlink:show="embed" xlink:actuate="onLoad" draw:mime-type="image/png"/></draw:frame><text:s text:c="2"/><text:span text:style-name="T4"><text:s/></text:span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4" text:anchor-type="page" text:anchor-page-number="1" svg:x="4.25in" svg:y="2.5in" svg:width="3.5in" svg:height="2in" draw:z-index="17">
        <draw:text-box>
          <text:p text:style-name="P4"/>
          <text:p text:style-name="P4"><draw:frame draw:style-name="fr2" draw:name="Image1 Copy 3" text:anchor-type="char" svg:x="2in" svg:y="-0.0402in" svg:width="1.4in" svg:height="1.4in" draw:z-index="18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2" text:anchor-type="char" svg:x="2in" svg:y="-0.0402in" svg:width="1.4in" svg:height="1.4in" draw:z-index="27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5" text:anchor-type="page" text:anchor-page-number="1" svg:x="0.75in" svg:y="4.5in" svg:width="3.5in" svg:height="2in" draw:z-index="8">
        <draw:text-box>
          <text:p text:style-name="P4"/>
          <text:p text:style-name="P4"><draw:frame draw:style-name="fr2" draw:name="Image1 Copy 4" text:anchor-type="char" svg:x="2in" svg:y="-0.0402in" svg:width="1.4in" svg:height="1.4in" draw:z-index="19"><draw:image xlink:href="Pictures/10000000000000E1000000E1C7AC578D.png" xlink:type="simple" xlink:show="embed" xlink:actuate="onLoad" draw:mime-type="image/png"/></draw:frame><text:s text:c="2"/><text:span text:style-name="T4"><text:s/></text:span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6" text:anchor-type="page" text:anchor-page-number="1" svg:x="4.25in" svg:y="4.5in" svg:width="3.5in" svg:height="2in" draw:z-index="0">
        <draw:text-box>
          <text:p text:style-name="P4"/>
          <text:p text:style-name="P4"><draw:frame draw:style-name="fr2" draw:name="Image1 Copy 5" text:anchor-type="char" svg:x="2in" svg:y="-0.0402in" svg:width="1.4in" svg:height="1.4in" draw:z-index="1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3" text:anchor-type="char" svg:x="2in" svg:y="-0.0402in" svg:width="1.4in" svg:height="1.4in" draw:z-index="28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7" text:anchor-type="page" text:anchor-page-number="1" svg:x="0.75in" svg:y="6.5in" svg:width="3.5in" svg:height="2in" draw:z-index="3">
        <draw:text-box>
          <text:p text:style-name="P4"/>
          <text:p text:style-name="P4"><draw:frame draw:style-name="fr2" draw:name="Image1 Copy 6" text:anchor-type="char" svg:x="2in" svg:y="-0.0402in" svg:width="1.4in" svg:height="1.4in" draw:z-index="4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5" text:anchor-type="char" svg:x="2in" svg:y="-0.0402in" svg:width="1.4in" svg:height="1.4in" draw:z-index="30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8" text:anchor-type="page" text:anchor-page-number="1" svg:x="4.25in" svg:y="6.5in" svg:width="3.5in" svg:height="2in" draw:z-index="6">
        <draw:text-box>
          <text:p text:style-name="P4"/>
          <text:p text:style-name="P4"><draw:frame draw:style-name="fr2" draw:name="Image1 Copy 7" text:anchor-type="char" svg:x="2in" svg:y="-0.0402in" svg:width="1.4in" svg:height="1.4in" draw:z-index="7"><draw:image xlink:href="Pictures/10000000000000E1000000E1C7AC578D.png" xlink:type="simple" xlink:show="embed" xlink:actuate="onLoad" draw:mime-type="image/png"/></draw:frame><text:s text:c="2"/><text:span text:style-name="T4"><text:s/></text:span><draw:frame draw:style-name="fr2" draw:name="Image1 Copy 14" text:anchor-type="char" svg:x="2in" svg:y="-0.0402in" svg:width="1.4in" svg:height="1.4in" draw:z-index="29"><draw:image xlink:href="Pictures/10000000000000E1000000E1C7AC578D.png" xlink:type="simple" xlink:show="embed" xlink:actuate="onLoad" draw:mime-type="image/png"/></draw:frame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</draw:text-box>
      </draw:frame>
      <draw:frame draw:style-name="fr1" draw:name="Frame9" text:anchor-type="page" text:anchor-page-number="1" svg:x="0.75in" svg:y="8.5in" svg:width="3.5in" svg:height="2in" draw:z-index="5">
        <draw:text-box>
          <text:p text:style-name="P4"/>
          <text:p text:style-name="P4"><draw:frame draw:style-name="fr2" draw:name="Image1 Copy 8" text:anchor-type="char" svg:x="2in" svg:y="-0.0402in" svg:width="1.4in" svg:height="1.4in" draw:z-index="9"><draw:image xlink:href="Pictures/10000000000000E1000000E1C7AC578D.png" xlink:type="simple" xlink:show="embed" xlink:actuate="onLoad" draw:mime-type="image/png"/></draw:frame><text:s text:c="2"/><text:span text:style-name="T4"><text:s/></text:span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  <text:p text:style-name="P5"/>
          <text:p text:style-name="P5"/>
        </draw:text-box>
      </draw:frame>
      <draw:frame draw:style-name="fr1" draw:name="Frame10" text:anchor-type="page" text:anchor-page-number="1" svg:x="4.25in" svg:y="8.5in" svg:width="3.5in" svg:height="2in" draw:z-index="10">
        <draw:text-box>
          <text:p text:style-name="P4"/>
          <text:p text:style-name="P4"><draw:frame draw:style-name="fr2" draw:name="Image1 Copy 9" text:anchor-type="char" svg:x="2in" svg:y="-0.0402in" svg:width="1.4in" svg:height="1.4in" draw:z-index="11"><draw:image xlink:href="Pictures/10000000000000E1000000E1C7AC578D.png" xlink:type="simple" xlink:show="embed" xlink:actuate="onLoad" draw:mime-type="image/png"/></draw:frame><text:s text:c="2"/><text:span text:style-name="T4"><text:s/></text:span><text:span text:style-name="T5">ARROW Communication</text:span></text:p>
          <text:p text:style-name="P11"><text:s text:c="24"/><text:span text:style-name="T3">Association</text:span></text:p>
          <text:p text:style-name="P4"><text:s text:c="25"/><text:span text:style-name="T9">w8rp.org</text:span></text:p>
          <text:p text:style-name="P15"><text:s text:c="18"/><text:span text:style-name="T8">Amateur Radio</text:span></text:p>
          <text:p text:style-name="P4"><text:span text:style-name="T6"><text:s text:c="3"/></text:span><text:span text:style-name="T7">monthly meetings &amp; testing</text:span> </text:p>
          <text:p text:style-name="P13"><text:s text:c="7"/><text:span text:style-name="T3">Field Day Breadboard</text:span></text:p>
          <text:p text:style-name="P9"><text:span text:style-name="T1"><text:s text:c="23"/></text:span><text:span text:style-name="T2">Keyer Project:</text:span></text:p>
          <text:p text:style-name="P7"><text:s text:c="3"/><text:a xlink:type="simple" xlink:href="https://github.com/jglandorf/breadboardKeyer" text:style-name="Internet_20_link" text:visited-style-name="Visited_20_Internet_20_Link"><text:span text:style-name="T3">https://github.com/jglandorf/breadboardKeyer</text:span></text:a> </text:p>
          <text:p text:style-name="P4"/>
          <text:p text:style-name="P5"/>
        </draw:text-box>
      </draw:frame>
      <text:p text:style-name="Standard"/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1:32:37.090347000</meta:creation-date>
    <dc:date>2026-06-19T16:56:05.634000000</dc:date>
    <meta:editing-duration>PT2H22M57S</meta:editing-duration>
    <meta:editing-cycles>18</meta:editing-cycles>
    <meta:generator>LibreOffice/24.2.3.2$Windows_X86_64 LibreOffice_project/433d9c2ded56988e8a90e6b2e771ee4e6a5ab2ba</meta:generator>
    <meta:print-date>2025-05-11T15:40:19.050000000</meta:print-date>
    <meta:document-statistic meta:table-count="0" meta:image-count="39" meta:object-count="0" meta:page-count="2" meta:paragraph-count="160" meta:word-count="320" meta:character-count="5260" meta:non-whitespace-character-count="2940"/>
  </office:meta>
</office:document-meta>
</file>